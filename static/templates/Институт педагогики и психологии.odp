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6EA01790.png" manifest:media-type="image/png"/>
  <manifest:file-entry manifest:full-path="Pictures/10000001000004FE000004FE0D31734A.png" manifest:media-type="image/png"/>
  <manifest:file-entry manifest:full-path="Pictures/10000001000001AA00000055F2CED9A8.png" manifest:media-type="image/png"/>
  <manifest:file-entry manifest:full-path="Pictures/10000001000004FC00000500BC5BA351.png" manifest:media-type="image/png"/>
  <manifest:file-entry manifest:full-path="Pictures/100000000000048300000483BC3C7B6E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ff9900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ff9900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9900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ff9900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ff9900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ff9900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ff990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ff9900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ff99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ff99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647cm" svg:height="8.647cm" svg:x="8.753cm" svg:y="9.101cm">
          <draw:image xlink:href="Pictures/10000001000004FE000004FE6EA01790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577cm" svg:y="11.4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15cm" svg:height="1.915cm" svg:x="26.685cm" svg:y="5.68cm">
          <draw:image xlink:href="Pictures/10000001000004FE000004FE0D31734A.png" xlink:type="simple" xlink:show="embed" xlink:actuate="onLoad" draw:mime-type="image/png">
            <text:p/>
          </draw:image>
        </draw:frame>
        <draw:frame draw:style-name="gr37" draw:text-style-name="P1" draw:layer="layout" svg:width="1.944cm" svg:height="1.95cm" svg:x="13.906cm" svg:y="0.55cm">
          <draw:image xlink:href="Pictures/10000001000004FC00000500BC5BA351.png" xlink:type="simple" xlink:show="embed" xlink:actuate="onLoad" draw:mime-type="image/png">
            <text:p/>
          </draw:image>
        </draw:frame>
        <draw:frame draw:style-name="gr37" draw:text-style-name="P1" draw:layer="layout" svg:width="2.1cm" svg:height="2.1cm" svg:x="30.4cm" svg:y="5.58cm">
          <draw:image xlink:href="Pictures/100000000000048300000483BC3C7B6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1</meta:editing-cycles>
    <meta:creation-date>2026-03-26T16:59:55</meta:creation-date>
    <dc:date>2026-04-24T17:55:36.079144800</dc:date>
    <meta:editing-duration>PT4H10M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