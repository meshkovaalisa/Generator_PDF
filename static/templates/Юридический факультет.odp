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00472638.png" manifest:media-type="image/png"/>
  <manifest:file-entry manifest:full-path="Pictures/1000000100000256000002568A3BE887.png" manifest:media-type="image/png"/>
  <manifest:file-entry manifest:full-path="Pictures/1000000100000256000002563F45FC17.png" manifest:media-type="image/png"/>
  <manifest:file-entry manifest:full-path="Pictures/10000001000001AA00000055F2CED9A8.png" manifest:media-type="image/png"/>
  <manifest:file-entry manifest:full-path="Pictures/10000001000002550000025625B8EF4B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9c1a15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9c1a15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599cm" fo:min-width="3.3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c1a15"/>
      <style:paragraph-properties fo:text-align="start"/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9c1a15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3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7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0095b6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15" style:family="text">
      <style:text-properties style:font-name="Arial" fo:font-size="28pt" style:font-size-asian="28pt" style:font-size-complex="28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8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2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4cm" svg:height="2.334cm" svg:x="30.277cm" svg:y="5.5cm">
          <draw:image xlink:href="Pictures/10000000000004830000048300472638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7.838cm" svg:height="7.838cm" svg:x="9.335cm" svg:y="9.55cm">
          <draw:image xlink:href="Pictures/1000000100000256000002568A3BE887.png" xlink:type="simple" xlink:show="embed" xlink:actuate="onLoad" draw:mime-type="image/png">
            <text:p/>
          </draw:image>
        </draw:frame>
        <draw:custom-shape draw:name="Shape 3" draw:style-name="gr5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text:p text:style-name="P14"><text:span text:style-name="T7">•</text:span><text:span text:style-name="T5"> {{study9}}</text:span></text:p>
          <text:p text:style-name="P14"><text:span text:style-name="T7">•</text:span><text:span text:style-name="T5"> {{study10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7" draw:layer="layout" svg:width="3.4cm" svg:height="0.8cm" svg:x="26cm" svg:y="7.68cm">
          <text:p text:style-name="P16"><text:span text:style-name="T8">Информация о программе и условиях поступл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9" draw:layer="layout" svg:width="12.496cm" svg:height="4.114cm" svg:x="0.711cm" svg:y="13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19" draw:layer="layout" svg:width="2.9cm" svg:height="1.88cm" svg:x="18.4cm" svg:y="13.22cm">
          <text:p text:style-name="P18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2" draw:layer="layout" svg:width="4.9cm" svg:height="0.863cm" svg:x="19.55cm" svg:y="13.68cm">
          <text:p text:style-name="P21"><text:span text:style-name="T1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8">Подписывайтесь на наши официальные каналы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3.323cm" svg:height="1.598cm" svg:x="18.677cm" svg:y="10.85cm">
          <text:p text:style-name="P23"><text:span text:style-name="T12">ЭТО: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0">1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18"><text:span text:style-name="T10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7.95cm" svg:y="15.681cm">
          <text:p text:style-name="P21"><text:span text:style-name="T11">профессорско-</text:span><text:span text:style-name="T11"><text:line-break/></text:span><text:span text:style-name="T1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0.95cm" svg:y="15.681cm">
          <text:p text:style-name="P21"><text:span text:style-name="T11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7.95cm" svg:y="13.681cm">
          <text:p text:style-name="P21"><text:span text:style-name="T11">профильных</text:span><text:span text:style-name="T11"><text:line-break/></text:span><text:span text:style-name="T1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18"><text:span text:style-name="T10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54cm" svg:height="1.957cm" svg:x="13.887cm" svg:y="0.55cm">
          <draw:image xlink:href="Pictures/10000001000002550000025625B8EF4B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26.52cm" svg:y="5.5cm">
          <draw:image xlink:href="Pictures/1000000100000256000002563F45FC17.png" xlink:type="simple" xlink:show="embed" xlink:actuate="onLoad" draw:mime-type="image/png">
            <text:p/>
          </draw:image>
        </draw:frame>
        <draw:custom-shape draw:name="Text 9" draw:style-name="gr37" draw:text-style-name="P26" draw:layer="layout" svg:width="15.7cm" svg:height="3.513cm" svg:x="1.3cm" svg:y="2.75cm">
          <text:p text:style-name="P25"><text:span text:style-name="T14">{{program}}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28" draw:layer="layout" svg:width="4.368cm" svg:height="0.634cm" svg:x="1.3cm" svg:y="9.25cm">
          <text:p text:style-name="P27"><text:span text:style-name="T16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30" draw:layer="layout" svg:width="5.7cm" svg:height="1.482cm" svg:x="1.3cm" svg:y="9.8cm">
          <text:p text:style-name="P29"><text:span text:style-name="T17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32" draw:layer="layout" svg:width="5.333cm" svg:height="0.634cm" svg:x="7.25cm" svg:y="9.25cm">
          <text:p text:style-name="P31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32" draw:layer="layout" svg:width="3.047cm" svg:height="0.634cm" svg:x="13.65cm" svg:y="9.25cm">
          <text:p text:style-name="P31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4" draw:layer="layout" svg:width="3.8cm" svg:height="0.609cm" svg:x="13.65cm" svg:y="11.35cm">
          <text:p text:style-name="P33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6" draw:layer="layout" svg:width="3.8cm" svg:height="2.276cm" svg:x="13.65cm" svg:y="11.95cm">
          <text:p text:style-name="P35"><text:span text:style-name="T17">{{VI_3}}</text:span><text:span text:style-name="T20"> </text:span></text:p>
          <text:p text:style-name="P35"><text:span text:style-name="T17">{{VI_4}}</text:span><text:span text:style-name="T20"> </text:span></text:p>
          <text:p text:style-name="P35"><text:span text:style-name="T17">{{VI_5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30" draw:layer="layout" svg:width="5.79cm" svg:height="0.634cm" svg:x="1.3cm" svg:y="13.55cm">
          <text:p text:style-name="P29"><text:span text:style-name="T21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32" draw:layer="layout" svg:width="12.085cm" svg:height="3.1cm" svg:x="1.25cm" svg:y="14.25cm">
          <text:p text:style-name="P31"><text:span text:style-name="T22">•</text:span><text:span text:style-name="T17"> {{opp1}}</text:span><text:span text:style-name="T6"> </text:span></text:p>
          <text:p text:style-name="P31"><text:span text:style-name="T22">•</text:span><text:span text:style-name="T17"> {{opp2}}</text:span><text:span text:style-name="T6"> </text:span></text:p>
          <text:p text:style-name="P31"><text:span text:style-name="T22">•</text:span><text:span text:style-name="T17"> {{opp3}}</text:span><text:span text:style-name="T6"> </text:span></text:p>
          <text:p text:style-name="P31"><text:span text:style-name="T22">•</text:span><text:span text:style-name="T17"> {{opp4}}</text:span><text:span text:style-name="T6"> </text:span></text:p>
          <text:p text:style-name="P31"><text:span text:style-name="T22">•</text:span><text:span text:style-name="T17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6" draw:text-style-name="P38" draw:layer="layout" svg:width="15.9cm" svg:height="2.85cm" svg:x="18.6cm" svg:y="9.2cm">
          <text:p text:style-name="P37"><text:span text:style-name="T14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7" draw:text-style-name="P30" draw:layer="layout" svg:width="5.5cm" svg:height="1.85cm" svg:x="7.25cm" svg:y="10.75cm">
          <text:p text:style-name="P29"><text:span text:style-name="T17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8" draw:text-style-name="P30" draw:layer="layout" svg:width="7.5cm" svg:height="1cm" svg:x="1.3cm" svg:y="6.879cm">
          <text:p text:style-name="P29"><text:span text:style-name="T1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9" draw:text-style-name="P36" draw:layer="layout" svg:width="3.8cm" svg:height="1.6cm" svg:x="13.65cm" svg:y="9.75cm">
          <text:p text:style-name="P35"><text:span text:style-name="T17">{{VI_1}}</text:span><text:span text:style-name="T20"> </text:span></text:p>
          <text:p text:style-name="P35"><text:span text:style-name="T17">{{VI_2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30" draw:layer="layout" svg:width="5.5cm" svg:height="0.814cm" svg:x="7.25cm" svg:y="9.936cm">
          <text:p text:style-name="P29"><text:span text:style-name="T17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1" draw:text-style-name="P28" draw:layer="layout" svg:width="4.368cm" svg:height="0.634cm" svg:x="1.3cm" svg:y="11.55cm">
          <text:p text:style-name="P27"><text:span text:style-name="T16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40" draw:layer="layout" svg:width="1.2cm" svg:height="0.8cm" svg:x="1.3cm" svg:y="12.2cm">
          <text:p text:style-name="P39"><text:span text:style-name="T17">{{budget_tota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" draw:text-style-name="P40" draw:layer="layout" svg:width="1.2cm" svg:height="0.8cm" svg:x="1.3cm" svg:y="12.9cm">
          <text:p text:style-name="P39"><text:span text:style-name="T17">{{off_budget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4" draw:text-style-name="P30" draw:layer="layout" svg:width="3.5cm" svg:height="0.9cm" svg:x="2.1cm" svg:y="12.1cm">
          <text:p text:style-name="P29"><text:span text:style-name="T17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" draw:text-style-name="P30" draw:layer="layout" svg:width="3.5cm" svg:height="0.9cm" svg:x="2.1cm" svg:y="12.8cm">
          <text:p text:style-name="P29"><text:span text:style-name="T17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42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5</meta:editing-cycles>
    <meta:creation-date>2026-03-26T16:59:55</meta:creation-date>
    <dc:date>2026-04-24T17:56:35.008365500</dc:date>
    <meta:editing-duration>PT4H4M39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