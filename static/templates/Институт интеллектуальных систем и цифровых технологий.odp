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26387DE5.png" manifest:media-type="image/png"/>
  <manifest:file-entry manifest:full-path="Pictures/10000001000001AA00000055F2CED9A8.png" manifest:media-type="image/png"/>
  <manifest:file-entry manifest:full-path="Pictures/10000001000004FE00000500BCBBF5CA.png" manifest:media-type="image/png"/>
  <manifest:file-entry manifest:full-path="Pictures/100000000000048300000483708C4813.png" manifest:media-type="image/png"/>
  <manifest:file-entry manifest:full-path="Pictures/10000001000004FE000004FE5DDA8052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008b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35%" draw:blue="10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00008b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3.0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68cm" fo:min-width="9.533cm" fo:padding-top="0.125cm" fo:padding-bottom="0.125cm" fo:padding-left="0.25cm" fo:padding-right="0.25cm" fo:wrap-option="wrap" loext:decorative="false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8b"/>
      <style:paragraph-properties fo:text-align="left"/>
      <style:text-properties fo:font-size="18pt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008b"/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6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7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8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008b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3" style:family="text">
      <style:text-properties fo:color="#00008b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00008b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" style:font-size-complex="14pt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17" style:family="text">
      <style:text-properties style:font-name="Arial" fo:font-size="28pt" style:font-size-asian="28pt" style:font-size-complex="2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1" style:family="text">
      <style:text-properties style:font-name="Arial" fo:font-size="18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3" style:family="text">
      <style:text-properties fo:font-variant="normal" fo:text-transform="none" fo:color="#00008b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8.247cm" svg:height="8.247cm" svg:x="9cm" svg:y="9.3cm">
          <draw:image xlink:href="Pictures/10000001000004FE000004FE26387DE5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1" draw:layer="layout" svg:width="7.2cm" svg:height="4.7cm" svg:x="18.75cm" svg:y="1.15cm">
          <text:p text:style-name="P10"><text:span text:style-name="T5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5" draw:layer="layout" svg:width="5.6cm" svg:height="4cm" svg:x="27.6cm" svg:y="1.35cm">
          <text:p text:style-name="P14"><text:span text:style-name="T7">•</text:span><text:span text:style-name="T5"> {{study1}}</text:span><text:span text:style-name="T8"> </text:span></text:p>
          <text:p text:style-name="P14"><text:span text:style-name="T7">•</text:span><text:span text:style-name="T5"> {{study2}}</text:span><text:span text:style-name="T8"> </text:span></text:p>
          <text:p text:style-name="P14"><text:span text:style-name="T7">•</text:span><text:span text:style-name="T5"> {{study3}}</text:span><text:span text:style-name="T8"> </text:span></text:p>
          <text:p text:style-name="P14"><text:span text:style-name="T7">•</text:span><text:span text:style-name="T5"> {{study4}}</text:span><text:span text:style-name="T8"> </text:span></text:p>
          <text:p text:style-name="P14"><text:span text:style-name="T7">•</text:span><text:span text:style-name="T5"> {{study5}}</text:span></text:p>
          <text:p text:style-name="P14"><text:span text:style-name="T7">•</text:span><text:span text:style-name="T5"> {{study6}}</text:span></text:p>
          <text:p text:style-name="P14"><text:span text:style-name="T7">•</text:span><text:span text:style-name="T5"> {{study7}}</text:span></text:p>
          <text:p text:style-name="P14"><text:span text:style-name="T7">•</text:span><text:span text:style-name="T5"> {{study8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7" draw:layer="layout" svg:width="3.4cm" svg:height="0.8cm" svg:x="26cm" svg:y="7.68cm">
          <text:p text:style-name="P16"><text:span text:style-name="T9">Информация о программе и условиях поступления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7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8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19" draw:text-style-name="P19" draw:layer="layout" svg:width="2.9cm" svg:height="1.88cm" svg:x="18.4cm" svg:y="13.22cm">
          <text:p text:style-name="P18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0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1" draw:text-style-name="P22" draw:layer="layout" svg:width="4.9cm" svg:height="0.863cm" svg:x="19.45cm" svg:y="13.68cm">
          <text:p text:style-name="P21"><text:span text:style-name="T12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2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3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4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5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6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7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9">Подписывайтесь на наши официальные каналы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2.599cm" svg:height="1.84cm" svg:x="18.677cm" svg:y="11.46cm">
          <text:p text:style-name="P23"><text:span text:style-name="T13">ЭТО: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19" draw:layer="layout" svg:width="2.9cm" svg:height="1.88cm" svg:x="18.4cm" svg:y="15.22cm">
          <text:p text:style-name="P18"><text:span text:style-name="T11">7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25"><text:span text:style-name="T11">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2" draw:layer="layout" svg:width="5.75cm" svg:height="0.863cm" svg:x="28.55cm" svg:y="15.681cm">
          <text:p text:style-name="P21"><text:span text:style-name="T12">профессорско-</text:span><text:span text:style-name="T12"><text:line-break/></text:span><text:span text:style-name="T12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2" draw:layer="layout" svg:width="3.05cm" svg:height="0.863cm" svg:x="20.95cm" svg:y="15.681cm">
          <text:p text:style-name="P26"><text:span text:style-name="T15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2" draw:layer="layout" svg:width="4.9cm" svg:height="0.863cm" svg:x="28.55cm" svg:y="13.681cm">
          <text:p text:style-name="P21"><text:span text:style-name="T12">профильных</text:span><text:span text:style-name="T12"><text:line-break/></text:span><text:span text:style-name="T12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25"><text:span text:style-name="T11">4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2.02cm" svg:height="2.023cm" svg:x="13.861cm" svg:y="0.484cm">
          <draw:image xlink:href="Pictures/10000001000004FE00000500BCBBF5CA.png" xlink:type="simple" xlink:show="embed" xlink:actuate="onLoad" draw:mime-type="image/png">
            <text:p/>
          </draw:image>
        </draw:frame>
        <draw:frame draw:style-name="gr28" draw:text-style-name="P3" draw:layer="layout" svg:width="2.11cm" svg:height="2.11cm" svg:x="26.59cm" svg:y="5.49cm">
          <draw:image xlink:href="Pictures/10000001000004FE000004FE5DDA8052.png" xlink:type="simple" xlink:show="embed" xlink:actuate="onLoad" draw:mime-type="image/png">
            <text:p/>
          </draw:image>
        </draw:frame>
        <draw:custom-shape draw:name="Text 9" draw:style-name="gr37" draw:text-style-name="P28" draw:layer="layout" svg:width="15.7cm" svg:height="3.513cm" svg:x="1.301cm" svg:y="2.75cm">
          <text:p text:style-name="P27"><text:span text:style-name="T16">{{program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8" draw:text-style-name="P6" draw:layer="layout" svg:width="10.032cm" svg:height="1.117cm" svg:x="1.22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9" draw:text-style-name="P11" draw:layer="layout" svg:width="7.5cm" svg:height="1cm" svg:x="1.301cm" svg:y="6.879cm">
          <text:p text:style-name="P10"><text:span text:style-name="T12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0" draw:text-style-name="P13" draw:layer="layout" svg:width="3.047cm" svg:height="0.634cm" svg:x="13.65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41" draw:text-style-name="P30" draw:layer="layout" svg:width="3.8cm" svg:height="0.609cm" svg:x="13.65cm" svg:y="11.35cm">
          <text:p text:style-name="P29"><text:span text:style-name="T18">ЕГЭ на выбор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42" draw:text-style-name="P32" draw:layer="layout" svg:width="3.8cm" svg:height="2.276cm" svg:x="13.65cm" svg:y="11.95cm">
          <text:p text:style-name="P31"><text:span text:style-name="T20">{{VI_3}}</text:span><text:span text:style-name="T21"> </text:span></text:p>
          <text:p text:style-name="P31"><text:span text:style-name="T20">{{VI_4}}</text:span><text:span text:style-name="T21"> </text:span></text:p>
          <text:p text:style-name="P31"><text:span text:style-name="T20">{{VI_5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3" draw:text-style-name="P32" draw:layer="layout" svg:width="3.8cm" svg:height="1.6cm" svg:x="13.65cm" svg:y="9.75cm">
          <text:p text:style-name="P31"><text:span text:style-name="T20">{{VI_1}}</text:span><text:span text:style-name="T21"> </text:span></text:p>
          <text:p text:style-name="P31"><text:span text:style-name="T20">{{VI_2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4" draw:text-style-name="P13" draw:layer="layout" svg:width="5.333cm" svg:height="0.634cm" svg:x="7.25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5" draw:text-style-name="P13" draw:layer="layout" svg:width="3.047cm" svg:height="0.634cm" svg:x="13.65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6" draw:text-style-name="P30" draw:layer="layout" svg:width="3.8cm" svg:height="0.609cm" svg:x="13.65cm" svg:y="11.35cm">
          <text:p text:style-name="P29"><text:span text:style-name="T18">ЕГЭ на выбор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7" draw:text-style-name="P32" draw:layer="layout" svg:width="3.8cm" svg:height="2.276cm" svg:x="13.65cm" svg:y="11.95cm">
          <text:p text:style-name="P31"><text:span text:style-name="T20">{{VI_3}}</text:span><text:span text:style-name="T21"> </text:span></text:p>
          <text:p text:style-name="P31"><text:span text:style-name="T20">{{VI_4}}</text:span><text:span text:style-name="T21"> </text:span></text:p>
          <text:p text:style-name="P31"><text:span text:style-name="T20">{{VI_5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8" draw:text-style-name="P11" draw:layer="layout" svg:width="5.5cm" svg:height="1.85cm" svg:x="7.25cm" svg:y="10.75cm">
          <text:p text:style-name="P10"><text:span text:style-name="T20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9" draw:text-style-name="P32" draw:layer="layout" svg:width="3.8cm" svg:height="1.6cm" svg:x="13.65cm" svg:y="9.75cm">
          <text:p text:style-name="P31"><text:span text:style-name="T20">{{VI_1}}</text:span><text:span text:style-name="T21"> </text:span></text:p>
          <text:p text:style-name="P31"><text:span text:style-name="T20">{{VI_2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0" draw:text-style-name="P11" draw:layer="layout" svg:width="5.5cm" svg:height="0.814cm" svg:x="7.25cm" svg:y="9.936cm">
          <text:p text:style-name="P10"><text:span text:style-name="T20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51" draw:text-style-name="P34" draw:layer="layout" svg:width="4.368cm" svg:height="0.634cm" svg:x="1.3cm" svg:y="9.25cm">
          <text:p text:style-name="P33"><text:span text:style-name="T22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52" draw:text-style-name="P11" draw:layer="layout" svg:width="5.7cm" svg:height="1.482cm" svg:x="1.3cm" svg:y="9.8cm">
          <text:p text:style-name="P10"><text:span text:style-name="T20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3" draw:text-style-name="P13" draw:layer="layout" svg:width="5.333cm" svg:height="0.634cm" svg:x="7.25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4" draw:text-style-name="P13" draw:layer="layout" svg:width="3.047cm" svg:height="0.634cm" svg:x="13.65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5" draw:text-style-name="P30" draw:layer="layout" svg:width="3.8cm" svg:height="0.609cm" svg:x="13.65cm" svg:y="11.35cm">
          <text:p text:style-name="P29"><text:span text:style-name="T18">ЕГЭ на выбор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56" draw:text-style-name="P32" draw:layer="layout" svg:width="3.8cm" svg:height="2.276cm" svg:x="13.65cm" svg:y="11.95cm">
          <text:p text:style-name="P31"><text:span text:style-name="T20">{{VI_3}}</text:span><text:span text:style-name="T21"> </text:span></text:p>
          <text:p text:style-name="P31"><text:span text:style-name="T20">{{VI_4}}</text:span><text:span text:style-name="T21"> </text:span></text:p>
          <text:p text:style-name="P31"><text:span text:style-name="T20">{{VI_5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57" draw:text-style-name="P13" draw:layer="layout" svg:width="12.085cm" svg:height="3.1cm" svg:x="1.25cm" svg:y="14.25cm">
          <text:p text:style-name="P12"><text:span text:style-name="T23">•</text:span><text:span text:style-name="T20"> {{opp1}}</text:span><text:span text:style-name="T6"> </text:span></text:p>
          <text:p text:style-name="P12"><text:span text:style-name="T23">•</text:span><text:span text:style-name="T20"> {{opp2}}</text:span><text:span text:style-name="T6"> </text:span></text:p>
          <text:p text:style-name="P12"><text:span text:style-name="T23">•</text:span><text:span text:style-name="T20"> {{opp3}}</text:span><text:span text:style-name="T6"> </text:span></text:p>
          <text:p text:style-name="P12"><text:span text:style-name="T23">•</text:span><text:span text:style-name="T20"> {{opp4}}</text:span><text:span text:style-name="T6"> </text:span></text:p>
          <text:p text:style-name="P12"><text:span text:style-name="T23">•</text:span><text:span text:style-name="T20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8" draw:text-style-name="P11" draw:layer="layout" svg:width="5.5cm" svg:height="1.85cm" svg:x="7.25cm" svg:y="10.75cm">
          <text:p text:style-name="P10"><text:span text:style-name="T20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9" draw:text-style-name="P32" draw:layer="layout" svg:width="3.8cm" svg:height="1.6cm" svg:x="13.65cm" svg:y="9.75cm">
          <text:p text:style-name="P31"><text:span text:style-name="T20">{{VI_1}}</text:span><text:span text:style-name="T21"> </text:span></text:p>
          <text:p text:style-name="P31"><text:span text:style-name="T20">{{VI_2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60" draw:text-style-name="P11" draw:layer="layout" svg:width="5.5cm" svg:height="0.814cm" svg:x="7.25cm" svg:y="9.936cm">
          <text:p text:style-name="P10"><text:span text:style-name="T20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61" draw:text-style-name="P34" draw:layer="layout" svg:width="4.368cm" svg:height="0.634cm" svg:x="1.3cm" svg:y="11.55cm">
          <text:p text:style-name="P33"><text:span text:style-name="T22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62" draw:text-style-name="P36" draw:layer="layout" svg:width="1.2cm" svg:height="0.8cm" svg:x="1.3cm" svg:y="12.2cm">
          <text:p text:style-name="P35"><text:span text:style-name="T20">{{budget_tota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63" draw:text-style-name="P36" draw:layer="layout" svg:width="1.2cm" svg:height="0.8cm" svg:x="1.3cm" svg:y="12.9cm">
          <text:p text:style-name="P35"><text:span text:style-name="T20">{{off_budget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64" draw:text-style-name="P11" draw:layer="layout" svg:width="3.5cm" svg:height="0.9cm" svg:x="2.1cm" svg:y="12.1cm">
          <text:p text:style-name="P10"><text:span text:style-name="T20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65" draw:text-style-name="P11" draw:layer="layout" svg:width="3.5cm" svg:height="0.9cm" svg:x="2.1cm" svg:y="12.8cm">
          <text:p text:style-name="P10"><text:span text:style-name="T20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66" draw:text-style-name="P38" draw:layer="layout" svg:width="15.9cm" svg:height="2.85cm" svg:x="18.6cm" svg:y="9.2cm">
          <text:p text:style-name="P37"><text:span text:style-name="T16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2.33cm" svg:height="2.33cm" svg:x="30.277cm" svg:y="5.35cm">
          <draw:image xlink:href="Pictures/100000000000048300000483708C481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7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1</meta:editing-cycles>
    <meta:creation-date>2026-03-26T16:59:55</meta:creation-date>
    <dc:date>2026-04-24T17:55:19.250713800</dc:date>
    <meta:editing-duration>PT3H44M34S</meta:editing-duration>
    <meta:generator>LibreOffice/26.2.2.2$Windows_X86_64 LibreOffice_project/1f77d10d6938fd34972958f64b2bcfa54f8b1ba5</meta:generator>
    <meta:document-statistic meta:object-count="10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