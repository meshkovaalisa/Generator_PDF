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B2BE3978.png" manifest:media-type="image/png"/>
  <manifest:file-entry manifest:full-path="Pictures/10000001000004FE000004FE92899EAD.png" manifest:media-type="image/png"/>
  <manifest:file-entry manifest:full-path="Pictures/10000001000001AA00000055F2CED9A8.png" manifest:media-type="image/png"/>
  <manifest:file-entry manifest:full-path="Pictures/10000001000004FE000004FEC5014629.png" manifest:media-type="image/png"/>
  <manifest:file-entry manifest:full-path="Pictures/10000001000004FD00000500B840B516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0064be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0064be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64be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0064be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64be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64be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0064be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0064be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0064be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0064be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747cm" svg:height="8.747cm" svg:x="8.753cm" svg:y="9cm">
          <draw:image xlink:href="Pictures/10000001000004FE000004FE92899EAD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577cm" svg:y="10.7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15cm" svg:height="1.915cm" svg:x="26.685cm" svg:y="5.68cm">
          <draw:image xlink:href="Pictures/10000001000004FE000004FEC5014629.png" xlink:type="simple" xlink:show="embed" xlink:actuate="onLoad" draw:mime-type="image/png">
            <text:p/>
          </draw:image>
        </draw:frame>
        <draw:frame draw:style-name="gr37" draw:text-style-name="P1" draw:layer="layout" svg:width="1.995cm" svg:height="2cm" svg:x="13.948cm" svg:y="0.5cm">
          <draw:image xlink:href="Pictures/10000001000004FD00000500B840B516.png" xlink:type="simple" xlink:show="embed" xlink:actuate="onLoad" draw:mime-type="image/png">
            <text:p/>
          </draw:image>
        </draw:frame>
        <draw:frame draw:style-name="gr37" draw:text-style-name="P1" draw:layer="layout" svg:width="2.255cm" svg:height="2.255cm" svg:x="30.427cm" svg:y="5.5cm">
          <draw:image xlink:href="Pictures/100000000000048300000483B2BE397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3</meta:editing-cycles>
    <meta:creation-date>2026-03-26T16:59:55</meta:creation-date>
    <dc:date>2026-04-24T17:56:20.463567400</dc:date>
    <meta:editing-duration>PT4H19M14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