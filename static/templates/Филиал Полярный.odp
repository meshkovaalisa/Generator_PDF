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00000048300000483BDD308D4.png" manifest:media-type="image/png"/>
  <manifest:file-entry manifest:full-path="Pictures/10000001000004FE000004FE01A6B35B.png" manifest:media-type="image/png"/>
  <manifest:file-entry manifest:full-path="Pictures/10000001000004FE000004FECA5D565E.png" manifest:media-type="image/png"/>
  <manifest:file-entry manifest:full-path="Pictures/10000001000001AA00000055F2CED9A8.png" manifest:media-type="image/png"/>
  <manifest:file-entry manifest:full-path="Pictures/10000001000004FE000004FFB82731C0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003366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003366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3366"/>
      <style:paragraph-properties fo:text-align="left"/>
      <style:text-properties fo:font-size="18pt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003366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3366" loext:opacity="100%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3366" loext:opacity="100%"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" style:font-size-complex="13.5pt" style:font-style-complex="normal" style:font-weight-complex="bold"/>
    </style:style>
    <style:style style:name="T5" style:family="text">
      <style:text-properties fo:color="#003366" loext:opacity="100%" fo:font-size="18pt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" style:font-size-complex="17pt" style:font-style-complex="normal" style:font-weight-complex="bold"/>
    </style:style>
    <style:style style:name="T19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" style:font-size-complex="14pt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747cm" svg:height="8.747cm" svg:x="8.753cm" svg:y="9cm">
          <draw:image xlink:href="Pictures/10000001000004FE000004FECA5D565E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7">{{abou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text:p text:style-name="P16"><text:span text:style-name="T9">•</text:span><text:span text:style-name="T7"> {{study6}}</text:span><text:span text:style-name="T10"> </text:span></text:p>
          <text:p text:style-name="P16"><text:span text:style-name="T9">•</text:span><text:span text:style-name="T7"> {{study7}}</text:span><text:span text:style-name="T10"> </text:span></text:p>
          <text:p text:style-name="P16"><text:span text:style-name="T9">•</text:span><text:span text:style-name="T7"> {{study8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4">{{VI_3}}</text:span><text:span text:style-name="T17"> </text:span></text:p>
          <text:p text:style-name="P24"><text:span text:style-name="T14">{{VI_4}}</text:span><text:span text:style-name="T17"> </text:span></text:p>
          <text:p text:style-name="P24"><text:span text:style-name="T14">{{VI_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8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33" draw:layer="layout" svg:width="2.599cm" svg:height="1.84cm" svg:x="18.677cm" svg:y="10.7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28" draw:layer="layout" svg:width="2.9cm" svg:height="1.88cm" svg:x="18.4cm" svg:y="15.22cm">
          <text:p text:style-name="P27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" draw:text-style-name="P28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36" draw:layer="layout" svg:width="5.45cm" svg:height="0.863cm" svg:x="28.55cm" svg:y="15.681cm">
          <text:p text:style-name="P35"><text:span text:style-name="T24">профессорско-</text:span><text:span text:style-name="T24"><text:line-break/></text:span><text:span text:style-name="T2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3" draw:text-style-name="P36" draw:layer="layout" svg:width="4.9cm" svg:height="0.863cm" svg:x="20.75cm" svg:y="15.681cm">
          <text:p text:style-name="P35"><text:span text:style-name="T2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" draw:text-style-name="P36" draw:layer="layout" svg:width="4.9cm" svg:height="0.863cm" svg:x="28.55cm" svg:y="13.681cm">
          <text:p text:style-name="P35"><text:span text:style-name="T24">профильных</text:span><text:span text:style-name="T24"><text:line-break/></text:span><text:span text:style-name="T2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5" draw:text-style-name="P28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3" draw:layer="layout" svg:width="5.5cm" svg:height="1.85cm" svg:x="7.25cm" svg:y="10.75cm">
          <text:p text:style-name="P12"><text:span text:style-name="T14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3" draw:layer="layout" svg:width="7.5cm" svg:height="1cm" svg:x="1.3cm" svg:y="6.879cm">
          <text:p text:style-name="P12"><text:span text:style-name="T2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25" draw:layer="layout" svg:width="3.8cm" svg:height="1.6cm" svg:x="13.65cm" svg:y="9.75cm">
          <text:p text:style-name="P24"><text:span text:style-name="T14">{{VI_1}}</text:span><text:span text:style-name="T17"> </text:span></text:p>
          <text:p text:style-name="P24"><text:span text:style-name="T14">{{VI_2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3" draw:layer="layout" svg:width="5.5cm" svg:height="0.814cm" svg:x="7.25cm" svg:y="9.936cm">
          <text:p text:style-name="P12"><text:span text:style-name="T14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1" draw:layer="layout" svg:width="4.368cm" svg:height="0.634cm" svg:x="1.3cm" svg:y="11.55cm">
          <text:p text:style-name="P20"><text:span text:style-name="T13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8" draw:layer="layout" svg:width="1.2cm" svg:height="0.8cm" svg:x="1.3cm" svg:y="12.2cm">
          <text:p text:style-name="P37"><text:span text:style-name="T14">{{budget_tota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2" draw:text-style-name="P38" draw:layer="layout" svg:width="1.2cm" svg:height="0.8cm" svg:x="1.3cm" svg:y="12.9cm">
          <text:p text:style-name="P37"><text:span text:style-name="T14">{{off_budget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3" draw:layer="layout" svg:width="3.5cm" svg:height="0.9cm" svg:x="2.1cm" svg:y="12.1cm">
          <text:p text:style-name="P12"><text:span text:style-name="T14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3" draw:layer="layout" svg:width="3.5cm" svg:height="0.9cm" svg:x="2.1cm" svg:y="12.8cm">
          <text:p text:style-name="P12"><text:span text:style-name="T14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1.948cm" svg:height="1.95cm" svg:x="13.948cm" svg:y="0.55cm">
          <draw:image xlink:href="Pictures/10000001000004FE000004FFB82731C0.png" xlink:type="simple" xlink:show="embed" xlink:actuate="onLoad" draw:mime-type="image/png">
            <text:p/>
          </draw:image>
        </draw:frame>
        <draw:frame draw:style-name="gr37" draw:text-style-name="P1" draw:layer="layout" svg:width="1.915cm" svg:height="1.915cm" svg:x="26.685cm" svg:y="5.68cm">
          <draw:image xlink:href="Pictures/10000001000004FE000004FE01A6B35B.png" xlink:type="simple" xlink:show="embed" xlink:actuate="onLoad" draw:mime-type="image/png">
            <text:p/>
          </draw:image>
        </draw:frame>
        <draw:frame draw:style-name="gr37" draw:text-style-name="P1" draw:layer="layout" svg:width="2.085cm" svg:height="2.085cm" svg:x="30.415cm" svg:y="5.595cm">
          <draw:image xlink:href="Pictures/100000000000048300000483BDD308D4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5" draw:layer="layout" svg:width="15.239cm" svg:height="8.572cm" svg:x="1.905cm" svg:y="3.175cm" draw:page-number="1" presentation:class="page"/>
          <draw:frame draw:name="Notes Placeholder 2" presentation:style-name="pr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26"><text:page-number>&lt;номер&gt;</text:page-number></text:span><text:span text:style-name="T26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43</meta:editing-cycles>
    <meta:creation-date>2026-03-26T16:59:55</meta:creation-date>
    <dc:date>2026-04-24T17:56:27.961966300</dc:date>
    <meta:editing-duration>PT4H19M25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