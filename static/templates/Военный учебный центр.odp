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1AA00000055F2CED9A8.png" manifest:media-type="image/png"/>
  <manifest:file-entry manifest:full-path="Pictures/10000001000004FE000004FE02459591.png" manifest:media-type="image/png"/>
  <manifest:file-entry manifest:full-path="Pictures/10000001000004FE000004FE13B9D4E1.png" manifest:media-type="image/png"/>
  <manifest:file-entry manifest:full-path="Pictures/1000000000000483000004830A0F8086.png" manifest:media-type="image/png"/>
  <manifest:file-entry manifest:full-path="Pictures/10000001000004FC000005008A46F977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1c542d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1c542d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1c542d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1c542d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1c542d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1c542d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1c542d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" style:font-size-complex="13.5pt" style:font-style-complex="normal" style:font-weight-complex="bold"/>
    </style:style>
    <style:style style:name="T5" style:family="text">
      <style:text-properties fo:color="#1c542d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1c542d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" style:font-size-complex="17pt" style:font-style-complex="normal" style:font-weight-complex="bold"/>
    </style:style>
    <style:style style:name="T19" style:family="text">
      <style:text-properties fo:font-variant="normal" fo:text-transform="none" fo:color="#1c542d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747cm" svg:height="8.747cm" svg:x="8.753cm" svg:y="9cm">
          <draw:image xlink:href="Pictures/10000001000004FE000004FE02459591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677cm" svg:y="10.7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15cm" svg:height="1.915cm" svg:x="26.685cm" svg:y="5.68cm">
          <draw:image xlink:href="Pictures/10000001000004FE000004FE13B9D4E1.png" xlink:type="simple" xlink:show="embed" xlink:actuate="onLoad" draw:mime-type="image/png">
            <text:p/>
          </draw:image>
        </draw:frame>
        <draw:frame draw:style-name="gr37" draw:text-style-name="P1" draw:layer="layout" svg:width="1.944cm" svg:height="1.95cm" svg:x="14cm" svg:y="0.55cm">
          <draw:image xlink:href="Pictures/10000001000004FC000005008A46F977.png" xlink:type="simple" xlink:show="embed" xlink:actuate="onLoad" draw:mime-type="image/png">
            <text:p/>
          </draw:image>
        </draw:frame>
        <draw:frame draw:style-name="gr37" draw:text-style-name="P1" draw:layer="layout" svg:width="2.223cm" svg:height="2.223cm" svg:x="30.5cm" svg:y="5.5cm">
          <draw:image xlink:href="Pictures/1000000000000483000004830A0F808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6</meta:editing-cycles>
    <meta:creation-date>2026-03-26T16:59:55</meta:creation-date>
    <dc:date>2026-04-24T17:54:57.623586200</dc:date>
    <meta:editing-duration>PT4H25M51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