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39400000397E2E63528.png" manifest:media-type="image/png"/>
  <manifest:file-entry manifest:full-path="Pictures/100000010000039700000397379BCA7A.png" manifest:media-type="image/png"/>
  <manifest:file-entry manifest:full-path="Pictures/10000001000001AA00000055F2CED9A8.png" manifest:media-type="image/png"/>
  <manifest:file-entry manifest:full-path="Pictures/100000000000078000000780597994D2.png" manifest:media-type="image/png"/>
  <manifest:file-entry manifest:full-path="Pictures/10000000000004830000048357BEA613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6d5a" svg:stroke-opacity="0%" draw:fill="solid" draw:fill-color="#006d5b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solid" svg:stroke-width="0.035cm" svg:stroke-color="#006d5a" svg:stroke-opacity="0%" draw:fill="solid" draw:fill-color="#006d5b" draw:textarea-vertical-align="top" draw:auto-grow-height="false" fo:min-height="8.625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318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06d5b"/>
      <style:paragraph-properties fo:text-align="lef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left" style:writing-mode="lr-tb"/>
      <style:text-properties fo:font-size="18pt"/>
    </style:style>
    <style:style style:name="P4" style:family="paragraph">
      <loext:graphic-properties draw:fill="solid" draw:fill-color="#006d5b"/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8" style:family="paragraph">
      <loext:graphic-properties draw:fill="solid" draw:fill-color="#ffffff"/>
      <style:paragraph-properties fo:text-align="lef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9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5" style:family="paragraph">
      <style:paragraph-properties fo:margin-left="0cm" fo:margin-right="0cm" fo:margin-top="0cm" fo:margin-bottom="0cm" fo:line-height="100%" fo:text-align="left" fo:text-indent="0cm" style:punctuation-wrap="hanging" loext:tab-stop-distance="0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" style:font-size-complex="28pt" style:font-style-complex="normal" style:font-weight-complex="bold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fo:font-variant="normal" fo:text-transform="none" fo:color="#006d5a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" style:font-size-complex="13.5pt" style:font-style-complex="normal" style:font-weight-complex="bold"/>
    </style:style>
    <style:style style:name="T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6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7" style:family="text">
      <style:text-properties style:font-name="Arial" fo:font-size="14pt" style:font-size-asian="14pt" style:font-size-complex="14pt"/>
    </style:style>
    <style:style style:name="T8" style:family="text">
      <style:text-properties fo:font-variant="normal" fo:text-transform="none" fo:color="#006d5a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13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4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" style:font-size-complex="13pt" style:font-style-complex="normal" style:font-weight-complex="bold"/>
    </style:style>
    <style:style style:name="T15" style:family="text">
      <style:text-properties style:font-name="Arial" fo:font-size="13pt" style:font-size-asian="13pt" style:font-size-complex="13pt"/>
    </style:style>
    <style:style style:name="T16" style:family="text">
      <style:text-properties style:font-name="Arial" fo:font-size="18pt"/>
    </style:style>
    <style:style style:name="T17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" style:font-size-complex="17pt" style:font-style-complex="normal" style:font-weight-complex="bold"/>
    </style:style>
    <style:style style:name="T18" style:family="text">
      <style:text-properties fo:font-variant="normal" fo:text-transform="none" fo:color="#006d5a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" style:font-size-complex="32pt" style:font-style-complex="normal" style:font-weight-complex="bold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Open Sans2" style:font-size-asian="28pt" style:font-style-asian="normal" style:font-weight-asian="normal" style:font-name-complex="Open Sans" style:font-size-complex="28pt" style:font-style-complex="normal" style:font-weight-complex="normal"/>
    </style:style>
    <style:style style:name="T22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ffffff" loext:opacity="100%" style:font-name="Arial" fo:font-size="14pt" fo:language="en" fo:country="US" fo:font-weight="bold" style:font-name-asian="Open Sans2" style:font-size-asian="14pt" style:font-weight-asian="bold" style:font-name-complex="Open Sans" style:font-size-complex="14pt" style:font-weight-complex="bold"/>
    </style:style>
    <style:style style:name="T24" style:family="text">
      <style:text-properties fo:font-size="18pt" fo:font-weight="normal" style:font-weight-asian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8.6cm" svg:height="8.6cm" svg:x="8.8cm" svg:y="9.2cm">
          <draw:image xlink:href="Pictures/100000010000039700000397379BCA7A.png" xlink:type="simple" xlink:show="embed" xlink:actuate="onLoad" draw:mime-type="image/png">
            <text:p/>
          </draw:image>
        </draw:frame>
        <draw:custom-shape draw:name="Shape 3" draw:style-name="gr3" draw:text-style-name="P4" draw:layer="layout" svg:width="17.779cm" svg:height="8.874cm" svg:x="17.78cm" svg:y="8.874cm">
          <text:p text:style-name="P3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5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" draw:text-style-name="P7" draw:layer="layout" svg:width="15.7cm" svg:height="3.513cm" svg:x="1.3cm" svg:y="2.75cm">
          <text:p text:style-name="P6"><text:span text:style-name="T2">{{program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5" draw:layer="layout" svg:width="10.032cm" svg:height="1.117cm" svg:x="1.219cm" svg:y="7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8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10" draw:layer="layout" svg:width="3.1cm" svg:height="0.5cm" svg:x="13.3cm" svg:y="7cm">
          <text:p text:style-name="P9"><text:span text:style-name="T4">{{education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11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3" draw:layer="layout" svg:width="5cm" svg:height="0.812cm" svg:x="18.75cm" svg:y="0.45cm">
          <text:p text:style-name="P12"><text:span text:style-name="T5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1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3" draw:layer="layout" svg:width="7.2cm" svg:height="4.7cm" svg:x="18.75cm" svg:y="1.15cm">
          <text:p text:style-name="P12"><text:span text:style-name="T6">{{abou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11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5" draw:layer="layout" svg:width="5.3cm" svg:height="0.812cm" svg:x="27.6cm" svg:y="0.55cm">
          <text:p text:style-name="P14"><text:span text:style-name="T5">Что я буду изучать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11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7" draw:layer="layout" svg:width="5.6cm" svg:height="4cm" svg:x="27.6cm" svg:y="1.35cm">
          <text:p text:style-name="P16"><text:span text:style-name="T8">•</text:span><text:span text:style-name="T6"> {{study1}}</text:span><text:span text:style-name="T9"> </text:span></text:p>
          <text:p text:style-name="P16"><text:span text:style-name="T8">•</text:span><text:span text:style-name="T6"> {{study2}}</text:span><text:span text:style-name="T9"> </text:span></text:p>
          <text:p text:style-name="P16"><text:span text:style-name="T8">•</text:span><text:span text:style-name="T6"> {{study3}}</text:span><text:span text:style-name="T9"> </text:span></text:p>
          <text:p text:style-name="P16"><text:span text:style-name="T8">•</text:span><text:span text:style-name="T6"> {{study4}}</text:span><text:span text:style-name="T9"> </text:span></text:p>
          <text:p text:style-name="P16"><text:span text:style-name="T8">•</text:span><text:span text:style-name="T6"> {{study5}}</text:span><text:span text:style-name="T9"> </text:span></text:p>
          <text:p text:style-name="P16"><text:span text:style-name="T8">•</text:span><text:span text:style-name="T6"> {{study6}}</text:span><text:span text:style-name="T9"> </text:span></text:p>
          <text:p text:style-name="P16"><text:span text:style-name="T8">•</text:span><text:span text:style-name="T6"> {{study7}}</text:span><text:span text:style-name="T9"> </text:span></text:p>
          <text:p text:style-name="P16"><text:span text:style-name="T8">•</text:span><text:span text:style-name="T6"> {{study8}}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11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9" draw:layer="layout" svg:width="3.4cm" svg:height="0.8cm" svg:x="26cm" svg:y="7.68cm">
          <text:p text:style-name="P18"><text:span text:style-name="T10">Информация о программе и условиях поступления</text:span><text:span text:style-name="T1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11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11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7" draw:text-style-name="P21" draw:layer="layout" svg:width="4.368cm" svg:height="0.634cm" svg:x="1.3cm" svg:y="9.25cm">
          <text:p text:style-name="P20"><text:span text:style-name="T12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11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8" draw:text-style-name="P13" draw:layer="layout" svg:width="5.7cm" svg:height="1.482cm" svg:x="1.3cm" svg:y="9.8cm">
          <text:p text:style-name="P12"><text:span text:style-name="T13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11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9" draw:text-style-name="P15" draw:layer="layout" svg:width="5.333cm" svg:height="0.634cm" svg:x="7.25cm" svg:y="9.25cm">
          <text:p text:style-name="P14"><text:span text:style-name="T5">Форма обучения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11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11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0" draw:text-style-name="P15" draw:layer="layout" svg:width="3.047cm" svg:height="0.634cm" svg:x="13.65cm" svg:y="9.25cm">
          <text:p text:style-name="P14"><text:span text:style-name="T5">ЕГЭ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1" draw:text-style-name="P11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11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2" draw:text-style-name="P23" draw:layer="layout" svg:width="3.8cm" svg:height="0.609cm" svg:x="13.65cm" svg:y="11.35cm">
          <text:p text:style-name="P22"><text:span text:style-name="T14">ЕГЭ на выбор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11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3" draw:text-style-name="P25" draw:layer="layout" svg:width="3.8cm" svg:height="2.276cm" svg:x="13.65cm" svg:y="11.95cm">
          <text:p text:style-name="P24"><text:span text:style-name="T13">{{VI_3}}</text:span><text:span text:style-name="T16"> </text:span></text:p>
          <text:p text:style-name="P24"><text:span text:style-name="T13">{{VI_4}}</text:span><text:span text:style-name="T16"> </text:span></text:p>
          <text:p text:style-name="P24"><text:span text:style-name="T13">{{VI_5}}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11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4" draw:text-style-name="P13" draw:layer="layout" svg:width="5.79cm" svg:height="0.634cm" svg:x="1.3cm" svg:y="13.55cm">
          <text:p text:style-name="P12"><text:span text:style-name="T17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5" draw:text-style-name="P15" draw:layer="layout" svg:width="12.085cm" svg:height="3.1cm" svg:x="1.25cm" svg:y="14.25cm">
          <text:p text:style-name="P14"><text:span text:style-name="T18">•</text:span><text:span text:style-name="T13"> {{opp1}}</text:span><text:span text:style-name="T7"> </text:span></text:p>
          <text:p text:style-name="P14"><text:span text:style-name="T18">•</text:span><text:span text:style-name="T13"> {{opp2}}</text:span><text:span text:style-name="T7"> </text:span></text:p>
          <text:p text:style-name="P14"><text:span text:style-name="T18">•</text:span><text:span text:style-name="T13"> {{opp3}}</text:span><text:span text:style-name="T7"> </text:span></text:p>
          <text:p text:style-name="P14"><text:span text:style-name="T18">•</text:span><text:span text:style-name="T13"> {{opp4}}</text:span><text:span text:style-name="T7"> </text:span></text:p>
          <text:p text:style-name="P14"><text:span text:style-name="T18">•</text:span><text:span text:style-name="T13"> {{opp5}}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5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26" draw:text-style-name="P7" draw:layer="layout" svg:width="15.9cm" svg:height="2.85cm" svg:x="18.6cm" svg:y="9.2cm">
          <text:p text:style-name="P26"><text:span text:style-name="T2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7" draw:text-style-name="P5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4" draw:text-style-name="P5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8" draw:text-style-name="P28" draw:layer="layout" svg:width="2.9cm" svg:height="1.88cm" svg:x="18.4cm" svg:y="13.22cm">
          <text:p text:style-name="P27"><text:span text:style-name="T19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9" draw:text-style-name="P29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0" draw:text-style-name="P31" draw:layer="layout" svg:width="4.9cm" svg:height="0.863cm" svg:x="20.15cm" svg:y="13.68cm">
          <text:p text:style-name="P30"><text:span text:style-name="T20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1" draw:text-style-name="P5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4" draw:text-style-name="P5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5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2" draw:text-style-name="P5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4" draw:text-style-name="P5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3" draw:text-style-name="P5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4" draw:text-style-name="P5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5" draw:text-style-name="P5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6" draw:text-style-name="P5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cm" svg:height="2.007cm" svg:x="13.9cm" svg:y="0.5cm">
          <draw:image xlink:href="Pictures/100000010000039400000397E2E63528.png" xlink:type="simple" xlink:show="embed" xlink:actuate="onLoad" draw:mime-type="image/png">
            <text:p/>
          </draw:image>
        </draw:frame>
        <draw:frame draw:style-name="gr2" draw:text-style-name="P2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37" draw:text-style-name="P19" draw:layer="layout" svg:width="3.4cm" svg:height="0.8cm" svg:x="29.9cm" svg:y="7.68cm">
          <text:p text:style-name="P18"><text:span text:style-name="T10">Подписывайтесь на наши официальные каналы</text:span><text:span text:style-name="T1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8" draw:text-style-name="P33" draw:layer="layout" svg:width="2.599cm" svg:height="1.84cm" svg:x="18.677cm" svg:y="11.46cm">
          <text:p text:style-name="P32"><text:span text:style-name="T21">ЭТО:</text:span><text:span text:style-name="T2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9" draw:text-style-name="P28" draw:layer="layout" svg:width="2.9cm" svg:height="1.88cm" svg:x="18.4cm" svg:y="15.22cm">
          <text:p text:style-name="P27"><text:span text:style-name="T19">4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0" draw:text-style-name="P28" draw:layer="layout" svg:width="2.9cm" svg:height="1.88cm" svg:x="26.1cm" svg:y="13.22cm">
          <text:p text:style-name="P34"><text:span text:style-name="T19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1" draw:text-style-name="P36" draw:layer="layout" svg:width="5.45cm" svg:height="0.863cm" svg:x="28.55cm" svg:y="15.681cm">
          <text:p text:style-name="P35"><text:span text:style-name="T23">профессорско-</text:span><text:span text:style-name="T23"><text:line-break/></text:span><text:span text:style-name="T23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2" draw:text-style-name="P36" draw:layer="layout" svg:width="4.9cm" svg:height="0.863cm" svg:x="20.75cm" svg:y="15.681cm">
          <text:p text:style-name="P35"><text:span text:style-name="T23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3" draw:text-style-name="P36" draw:layer="layout" svg:width="4.9cm" svg:height="0.863cm" svg:x="28.55cm" svg:y="13.681cm">
          <text:p text:style-name="P35"><text:span text:style-name="T23">профильных</text:span><text:span text:style-name="T23"><text:line-break/></text:span><text:span text:style-name="T23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4" draw:text-style-name="P28" draw:layer="layout" svg:width="2.9cm" svg:height="1.88cm" svg:x="26.1cm" svg:y="15.22cm">
          <text:p text:style-name="P34"><text:span text:style-name="T19">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.915cm" svg:height="1.915cm" svg:x="26.685cm" svg:y="5.68cm">
          <draw:image xlink:href="Pictures/100000000000078000000780597994D2.png" xlink:type="simple" xlink:show="embed" xlink:actuate="onLoad" draw:mime-type="image/png">
            <text:p/>
          </draw:image>
        </draw:frame>
        <draw:custom-shape draw:name="Text 47" draw:style-name="gr45" draw:text-style-name="P13" draw:layer="layout" svg:width="5.5cm" svg:height="1.85cm" svg:x="7.25cm" svg:y="10.75cm">
          <text:p text:style-name="P12"><text:span text:style-name="T13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6" draw:text-style-name="P13" draw:layer="layout" svg:width="7.5cm" svg:height="1cm" svg:x="1.3cm" svg:y="6.879cm">
          <text:p text:style-name="P12"><text:span text:style-name="T20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7" draw:text-style-name="P25" draw:layer="layout" svg:width="3.8cm" svg:height="1.6cm" svg:x="13.65cm" svg:y="9.75cm">
          <text:p text:style-name="P24"><text:span text:style-name="T13">{{VI_1}}</text:span><text:span text:style-name="T16"> </text:span></text:p>
          <text:p text:style-name="P24"><text:span text:style-name="T13">{{VI_2}}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8" draw:text-style-name="P13" draw:layer="layout" svg:width="5.5cm" svg:height="0.814cm" svg:x="7.25cm" svg:y="9.936cm">
          <text:p text:style-name="P12"><text:span text:style-name="T13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49" draw:text-style-name="P21" draw:layer="layout" svg:width="4.368cm" svg:height="0.634cm" svg:x="1.3cm" svg:y="11.55cm">
          <text:p text:style-name="P20"><text:span text:style-name="T12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0" draw:text-style-name="P38" draw:layer="layout" svg:width="1.2cm" svg:height="0.8cm" svg:x="1.3cm" svg:y="12.2cm">
          <text:p text:style-name="P37"><text:span text:style-name="T13">{{budget_total}}</text:span><text:span text:style-name="T2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1" draw:text-style-name="P38" draw:layer="layout" svg:width="1.2cm" svg:height="0.8cm" svg:x="1.3cm" svg:y="12.9cm">
          <text:p text:style-name="P37"><text:span text:style-name="T13">{{off_budgetl}}</text:span><text:span text:style-name="T2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2" draw:text-style-name="P13" draw:layer="layout" svg:width="3.5cm" svg:height="0.9cm" svg:x="2.1cm" svg:y="12.1cm">
          <text:p text:style-name="P12"><text:span text:style-name="T13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3" draw:text-style-name="P13" draw:layer="layout" svg:width="3.5cm" svg:height="0.9cm" svg:x="2.1cm" svg:y="12.8cm">
          <text:p text:style-name="P12"><text:span text:style-name="T13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.292cm" svg:height="2.292cm" svg:x="30.408cm" svg:y="5.5cm">
          <draw:image xlink:href="Pictures/10000000000004830000048357BEA613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4" draw:layer="layout" svg:width="15.239cm" svg:height="8.572cm" svg:x="1.905cm" svg:y="3.175cm" draw:page-number="1" presentation:class="page"/>
          <draw:frame draw:name="Notes Placeholder 2" presentation:style-name="pr1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25"><text:page-number>&lt;номер&gt;</text:page-number></text:span><text:span text:style-name="T25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37</meta:editing-cycles>
    <meta:creation-date>2026-03-26T16:59:55</meta:creation-date>
    <dc:date>2026-04-24T17:55:08.117455400</dc:date>
    <meta:editing-duration>PT3H54M30S</meta:editing-duration>
    <meta:generator>LibreOffice/26.2.2.2$Windows_X86_64 LibreOffice_project/1f77d10d6938fd34972958f64b2bcfa54f8b1ba5</meta:generator>
    <meta:document-statistic meta:object-count="94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