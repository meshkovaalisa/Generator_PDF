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FE5ED3C6.png" manifest:media-type="image/png"/>
  <manifest:file-entry manifest:full-path="Pictures/10000001000001AA00000055F2CED9A8.png" manifest:media-type="image/png"/>
  <manifest:file-entry manifest:full-path="Pictures/10000001000004FC000005006AB6927C.png" manifest:media-type="image/png"/>
  <manifest:file-entry manifest:full-path="Pictures/10000001000004FE000004FE516D53C0.png" manifest:media-type="image/png"/>
  <manifest:file-entry manifest:full-path="Pictures/10000000000004830000048358D37753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009b76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009b76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b76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009b76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9b76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9b76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009b7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009b76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9b7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009b7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747cm" svg:height="8.747cm" svg:x="8.753cm" svg:y="9cm">
          <draw:image xlink:href="Pictures/10000001000004FE000004FEFE5ED3C6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677cm" svg:y="11.6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44cm" svg:height="1.95cm" svg:x="14cm" svg:y="0.55cm">
          <draw:image xlink:href="Pictures/10000001000004FC000005006AB6927C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516D53C0.png" xlink:type="simple" xlink:show="embed" xlink:actuate="onLoad" draw:mime-type="image/png">
            <text:p/>
          </draw:image>
        </draw:frame>
        <draw:frame draw:style-name="gr37" draw:text-style-name="P1" draw:layer="layout" svg:width="2cm" svg:height="2cm" svg:x="30.5cm" svg:y="5.68cm">
          <draw:image xlink:href="Pictures/10000000000004830000048358D3775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3</meta:editing-cycles>
    <meta:creation-date>2026-03-26T16:59:55</meta:creation-date>
    <dc:date>2026-04-24T17:56:07.766456300</dc:date>
    <meta:editing-duration>PT4H19M48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