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B6962F29.png" manifest:media-type="image/png"/>
  <manifest:file-entry manifest:full-path="Pictures/10000001000004FE000004FE2D8D1019.png" manifest:media-type="image/png"/>
  <manifest:file-entry manifest:full-path="Pictures/10000001000001AA00000055F2CED9A8.png" manifest:media-type="image/png"/>
  <manifest:file-entry manifest:full-path="Pictures/10000001000004FD000005003902CA07.png" manifest:media-type="image/png"/>
  <manifest:file-entry manifest:full-path="Pictures/10000001000004FE000004FE546302A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5f09c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30%" draw:blue="100%" fo:clip="rect(0cm, 0cm, 0cm, 0cm)" draw:image-opacity="20%" style:mirror="none" loext:decorative="false"/>
    </style:style>
    <style:style style:name="gr5" style:family="graphic" style:parent-style-name="standard">
      <style:graphic-properties draw:stroke="solid" svg:stroke-width="0.035cm" svg:stroke-color="#006d5a" svg:stroke-opacity="0%" draw:fill="solid" draw:fill-color="#5f09c6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f09c6"/>
      <style:paragraph-properties fo:text-align="left"/>
      <style:text-properties fo:font-size="18pt"/>
    </style:style>
    <style:style style:name="P3" style:family="paragraph">
      <loext:graphic-properties draw:fill="solid" draw:fill-color="#ffffff"/>
      <style:paragraph-properties fo:text-align="left"/>
      <style:text-properties fo:font-size="18pt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5f09c6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5f09c6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f09c6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3" style:family="text">
      <style:text-properties fo:color="#5f09c6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16" style:family="text">
      <style:text-properties style:font-name="Arial" fo:font-size="28pt" style:font-size-asian="28pt" style:font-size-complex="28pt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8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20" style:family="text">
      <style:text-properties style:font-name="Arial" fo:font-size="13pt" style:font-size-asian="13pt" style:font-size-complex="13pt"/>
    </style:style>
    <style:style style:name="T21" style:family="text">
      <style:text-properties style:font-name="Arial" fo:font-size="18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23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3cm" svg:height="2.33cm" svg:x="30.277cm" svg:y="5.35cm">
          <draw:image xlink:href="Pictures/100000000000048300000483B6962F29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7.838cm" svg:height="7.838cm" svg:x="9.335cm" svg:y="9.448cm">
          <draw:image xlink:href="Pictures/10000001000004FE000004FE2D8D1019.png" xlink:type="simple" xlink:show="embed" xlink:actuate="onLoad" draw:mime-type="image/png">
            <text:p/>
          </draw:image>
        </draw:frame>
        <draw:custom-shape draw:name="Shape 3" draw:style-name="gr5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3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8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1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" draw:text-style-name="P11" draw:layer="layout" svg:width="7.2cm" svg:height="4.7cm" svg:x="18.75cm" svg:y="1.15cm">
          <text:p text:style-name="P10"><text:span text:style-name="T5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" draw:text-style-name="P15" draw:layer="layout" svg:width="5.6cm" svg:height="4cm" svg:x="27.6cm" svg:y="1.35cm">
          <text:p text:style-name="P14"><text:span text:style-name="T7">•</text:span><text:span text:style-name="T5"> {{study1}}</text:span></text:p>
          <text:p text:style-name="P14"><text:span text:style-name="T7">•</text:span><text:span text:style-name="T5"> {{study2}}</text:span></text:p>
          <text:p text:style-name="P14"><text:span text:style-name="T7">•</text:span><text:span text:style-name="T5"> {{study3}}</text:span></text:p>
          <text:p text:style-name="P14"><text:span text:style-name="T7">•</text:span><text:span text:style-name="T5"> {{study4}}</text:span></text:p>
          <text:p text:style-name="P14"><text:span text:style-name="T7">•</text:span><text:span text:style-name="T5"> {{study5}}</text:span></text:p>
          <text:p text:style-name="P14"><text:span text:style-name="T7">•</text:span><text:span text:style-name="T5"> {{study6}}</text:span></text:p>
          <text:p text:style-name="P14"><text:span text:style-name="T7">•</text:span><text:span text:style-name="T5"> {{study7}}</text:span></text:p>
          <text:p text:style-name="P14"><text:span text:style-name="T7">•</text:span><text:span text:style-name="T5"> {{study8}}</text:span></text:p>
          <text:p text:style-name="P14"><text:span text:style-name="T7">•</text:span><text:span text:style-name="T5"> {{study9}}</text:span></text:p>
          <text:p text:style-name="P14"><text:span text:style-name="T7">•</text:span><text:span text:style-name="T5"> {{study10}}</text:span></text:p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6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" draw:text-style-name="P17" draw:layer="layout" svg:width="3.4cm" svg:height="0.8cm" svg:x="26cm" svg:y="7.68cm">
          <text:p text:style-name="P16"><text:span text:style-name="T9">Информация о программе и условиях поступления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9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9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9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9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9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9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9" draw:text-style-name="P9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6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9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6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0" draw:text-style-name="P19" draw:layer="layout" svg:width="2.9cm" svg:height="1.88cm" svg:x="18.4cm" svg:y="13.22cm">
          <text:p text:style-name="P18"><text:span text:style-name="T11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2" draw:text-style-name="P22" draw:layer="layout" svg:width="4.9cm" svg:height="0.863cm" svg:x="20.25cm" svg:y="13.68cm">
          <text:p text:style-name="P21"><text:span text:style-name="T12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3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6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6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4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6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5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6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7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8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9">Подписывайтесь на наши официальные каналы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1.26cm">
          <text:p text:style-name="P23"><text:span text:style-name="T13">ЭТО: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19" draw:layer="layout" svg:width="2.9cm" svg:height="1.88cm" svg:x="18.4cm" svg:y="15.22cm">
          <text:p text:style-name="P18"><text:span text:style-name="T11">95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25"><text:span text:style-name="T11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2" draw:layer="layout" svg:width="5.75cm" svg:height="0.863cm" svg:x="28.55cm" svg:y="15.681cm">
          <text:p text:style-name="P21"><text:span text:style-name="T12">профессорско-</text:span><text:span text:style-name="T12"><text:line-break/></text:span><text:span text:style-name="T12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2" draw:layer="layout" svg:width="4.9cm" svg:height="0.863cm" svg:x="20.95cm" svg:y="15.681cm">
          <text:p text:style-name="P21"><text:span text:style-name="T12">студентов</text:span><text:span text:style-name="T12"><text:line-break/></text:span><text:span text:style-name="T12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2" draw:layer="layout" svg:width="4.9cm" svg:height="0.863cm" svg:x="28.55cm" svg:y="13.681cm">
          <text:p text:style-name="P21"><text:span text:style-name="T12">профильных</text:span><text:span text:style-name="T12"><text:line-break/></text:span><text:span text:style-name="T12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25"><text:span text:style-name="T11">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53cm" svg:height="1.957cm" svg:x="13.887cm" svg:y="0.55cm">
          <draw:image xlink:href="Pictures/10000001000004FD000005003902CA07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26.5cm" svg:y="5.5cm">
          <draw:image xlink:href="Pictures/10000001000004FE000004FE546302A3.png" xlink:type="simple" xlink:show="embed" xlink:actuate="onLoad" draw:mime-type="image/png">
            <text:p/>
          </draw:image>
        </draw:frame>
        <draw:custom-shape draw:name="Text 9" draw:style-name="gr37" draw:text-style-name="P27" draw:layer="layout" svg:width="15.7cm" svg:height="3.513cm" svg:x="1.3cm" svg:y="2.75cm">
          <text:p text:style-name="P26"><text:span text:style-name="T15">{{program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8" draw:text-style-name="P29" draw:layer="layout" svg:width="4.368cm" svg:height="0.634cm" svg:x="1.3cm" svg:y="9.25cm">
          <text:p text:style-name="P28"><text:span text:style-name="T17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9" draw:text-style-name="P11" draw:layer="layout" svg:width="5.7cm" svg:height="1.482cm" svg:x="1.3cm" svg:y="9.8cm">
          <text:p text:style-name="P10"><text:span text:style-name="T18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0" draw:text-style-name="P13" draw:layer="layout" svg:width="5.333cm" svg:height="0.634cm" svg:x="7.25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1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2" draw:text-style-name="P31" draw:layer="layout" svg:width="3.8cm" svg:height="0.609cm" svg:x="13.65cm" svg:y="11.35cm">
          <text:p text:style-name="P30"><text:span text:style-name="T19">ЕГЭ на выбор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3" draw:text-style-name="P33" draw:layer="layout" svg:width="3.8cm" svg:height="2.276cm" svg:x="13.65cm" svg:y="11.95cm">
          <text:p text:style-name="P32"><text:span text:style-name="T18">{{VI_3}}</text:span><text:span text:style-name="T21"> </text:span></text:p>
          <text:p text:style-name="P32"><text:span text:style-name="T18">{{VI_4}}</text:span><text:span text:style-name="T21"> </text:span></text:p>
          <text:p text:style-name="P32"><text:span text:style-name="T18">{{VI_5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4" draw:text-style-name="P11" draw:layer="layout" svg:width="5.79cm" svg:height="0.634cm" svg:x="1.3cm" svg:y="13.55cm">
          <text:p text:style-name="P10"><text:span text:style-name="T22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5" draw:text-style-name="P13" draw:layer="layout" svg:width="12.085cm" svg:height="3.1cm" svg:x="1.25cm" svg:y="14.25cm">
          <text:p text:style-name="P12"><text:span text:style-name="T23">•</text:span><text:span text:style-name="T18"> {{opp1}}</text:span><text:span text:style-name="T6"> </text:span></text:p>
          <text:p text:style-name="P12"><text:span text:style-name="T23">•</text:span><text:span text:style-name="T18"> {{opp2}}</text:span><text:span text:style-name="T6"> </text:span></text:p>
          <text:p text:style-name="P12"><text:span text:style-name="T23">•</text:span><text:span text:style-name="T18"> {{opp3}}</text:span><text:span text:style-name="T6"> </text:span></text:p>
          <text:p text:style-name="P12"><text:span text:style-name="T23">•</text:span><text:span text:style-name="T18"> {{opp4}}</text:span><text:span text:style-name="T6"> </text:span></text:p>
          <text:p text:style-name="P12"><text:span text:style-name="T23">•</text:span><text:span text:style-name="T18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1" draw:layer="layout" svg:width="5.5cm" svg:height="1.85cm" svg:x="7.25cm" svg:y="10.75cm">
          <text:p text:style-name="P10"><text:span text:style-name="T18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1" draw:layer="layout" svg:width="7.5cm" svg:height="1cm" svg:x="1.3cm" svg:y="6.879cm">
          <text:p text:style-name="P10"><text:span text:style-name="T12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33" draw:layer="layout" svg:width="3.8cm" svg:height="1.6cm" svg:x="13.65cm" svg:y="9.75cm">
          <text:p text:style-name="P32"><text:span text:style-name="T18">{{VI_1}}</text:span><text:span text:style-name="T21"> </text:span></text:p>
          <text:p text:style-name="P32"><text:span text:style-name="T18">{{VI_2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1" draw:layer="layout" svg:width="5.5cm" svg:height="0.814cm" svg:x="7.25cm" svg:y="9.936cm">
          <text:p text:style-name="P10"><text:span text:style-name="T18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9" draw:layer="layout" svg:width="4.368cm" svg:height="0.634cm" svg:x="1.3cm" svg:y="11.55cm">
          <text:p text:style-name="P28"><text:span text:style-name="T17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5" draw:layer="layout" svg:width="1.2cm" svg:height="0.8cm" svg:x="1.3cm" svg:y="12.2cm">
          <text:p text:style-name="P34"><text:span text:style-name="T18">{{budget_tota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2" draw:text-style-name="P11" draw:layer="layout" svg:width="3.5cm" svg:height="0.9cm" svg:x="2.1cm" svg:y="12.1cm">
          <text:p text:style-name="P10"><text:span text:style-name="T18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3" draw:text-style-name="P11" draw:layer="layout" svg:width="3.5cm" svg:height="0.9cm" svg:x="2.1cm" svg:y="12.8cm">
          <text:p text:style-name="P10"><text:span text:style-name="T18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4" draw:text-style-name="P35" draw:layer="layout" svg:width="1.2cm" svg:height="0.8cm" svg:x="1.3cm" svg:y="12.9cm">
          <text:p text:style-name="P34"><text:span text:style-name="T18">{{off_budget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55" draw:text-style-name="P37" draw:layer="layout" svg:width="15.9cm" svg:height="2.85cm" svg:x="18.6cm" svg:y="9.2cm">
          <text:p text:style-name="P36"><text:span text:style-name="T15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3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39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5</meta:editing-cycles>
    <meta:creation-date>2026-03-26T16:59:55</meta:creation-date>
    <dc:date>2026-04-24T17:55:42.318847000</dc:date>
    <meta:editing-duration>PT3H53M17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