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39400000397E2E63528.png" manifest:media-type="image/png"/>
  <manifest:file-entry manifest:full-path="Pictures/100000010000039700000397379BCA7A.png" manifest:media-type="image/png"/>
  <manifest:file-entry manifest:full-path="Pictures/10000001000001AA00000055F2CED9A8.png" manifest:media-type="image/png"/>
  <manifest:file-entry manifest:full-path="Pictures/100000000000078000000780597994D2.png" manifest:media-type="image/png"/>
  <manifest:file-entry manifest:full-path="Pictures/100000010000006B0000006B02222620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6d5a" svg:stroke-opacity="0%" draw:fill="solid" draw:fill-color="#006d5b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.035cm" svg:stroke-color="#006d5a" svg:stroke-opacity="0%" draw:fill="solid" draw:fill-color="#006d5b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901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2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214cm" fo:min-width="3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365cm" fo:min-width="2.6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365cm" fo:min-width="2.6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365cm" fo:min-width="2.6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365cm" fo:min-width="2.6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365cm" fo:min-width="2.6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6d5b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fo:font-size="18pt"/>
    </style:style>
    <style:style style:name="P5" style:family="paragraph">
      <loext:graphic-properties draw:fill="solid" draw:fill-color="#006d5b"/>
      <style:paragraph-properties fo:text-align="star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8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9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1" style:family="paragraph">
      <loext:graphic-properties draw:fill="solid" draw:fill-color="#006d5a" draw:opacity="0%"/>
      <style:paragraph-properties fo:text-align="start" style:writing-mode="lr-tb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8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3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fo:color="#006d5a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006d5a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006d5a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8.6cm" svg:height="8.6cm" svg:x="8.8cm" svg:y="9.2cm">
          <draw:image xlink:href="Pictures/100000010000039700000397379BCA7A.png" xlink:type="simple" xlink:show="embed" xlink:actuate="onLoad" draw:mime-type="image/png">
            <text:p/>
          </draw:image>
        </draw:frame>
        <draw:custom-shape draw:name="Shape 3" draw:style-name="gr4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" draw:text-style-name="P8" draw:layer="layout" svg:width="15.7cm" svg:height="3.513cm" svg:x="1.3cm" svg:y="3.15cm">
          <text:p text:style-name="P7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" draw:text-style-name="P10" draw:layer="layout" svg:width="10.5cm" svg:height="1cm" svg:x="1.3cm" svg:y="6.879cm">
          <text:p text:style-name="P9"><text:span text:style-name="T4">{{code_lin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2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9" draw:text-style-name="P12" draw:layer="layout" svg:width="3.1cm" svg:height="0.5cm" svg:x="13.3cm" svg:y="7cm">
          <text:p text:style-name="P11"><text:span text:style-name="T5">{{degre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" draw:text-style-name="P13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" draw:text-style-name="P10" draw:layer="layout" svg:width="5cm" svg:height="0.812cm" svg:x="18.75cm" svg:y="0.45cm">
          <text:p text:style-name="P9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13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" draw:text-style-name="P10" draw:layer="layout" svg:width="7.2cm" svg:height="4.7cm" svg:x="18.75cm" svg:y="1.15cm">
          <text:p text:style-name="P9"><text:span text:style-name="T7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4" draw:text-style-name="P13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5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0" draw:text-style-name="P13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6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7" draw:text-style-name="P13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8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0" draw:text-style-name="P13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10" draw:text-style-name="P13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9" draw:text-style-name="P21" draw:layer="layout" svg:width="4.368cm" svg:height="0.634cm" svg:x="1.3cm" svg:y="9.5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0" draw:text-style-name="P13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20" draw:text-style-name="P10" draw:layer="layout" svg:width="5.7cm" svg:height="1.9cm" svg:x="1.3cm" svg:y="10.1cm">
          <text:p text:style-name="P9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0" draw:text-style-name="P13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21" draw:text-style-name="P15" draw:layer="layout" svg:width="5.333cm" svg:height="0.634cm" svg:x="7.55cm" svg:y="9.5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10" draw:text-style-name="P13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22" draw:text-style-name="P10" draw:layer="layout" svg:width="5.5cm" svg:height="1.25cm" svg:x="7.55cm" svg:y="9.95cm">
          <text:p text:style-name="P9"><text:span text:style-name="T14">{{mod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0" draw:text-style-name="P13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3" draw:text-style-name="P15" draw:layer="layout" svg:width="3.047cm" svg:height="0.634cm" svg:x="13.65cm" svg:y="9.5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4" draw:text-style-name="P13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25" draw:text-style-name="P23" draw:layer="layout" svg:width="3.9cm" svg:height="1.213cm" svg:x="13.65cm" svg:y="10.25cm">
          <text:p text:style-name="P22"><text:span text:style-name="T14">{{exam1}}</text:span><text:span text:style-name="T8"> </text:span></text:p>
          <text:p text:style-name="P22"><text:span text:style-name="T14">{{exam2}}</text:span></text:p>
          <text:p text:style-name="P2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10" draw:text-style-name="P13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6" draw:text-style-name="P25" draw:layer="layout" svg:width="3.8cm" svg:height="0.609cm" svg:x="13.65cm" svg:y="11.65cm">
          <text:p text:style-name="P24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10" draw:text-style-name="P13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7" draw:text-style-name="P27" draw:layer="layout" svg:width="3.8cm" svg:height="2cm" svg:x="13.65cm" svg:y="12.35cm">
          <text:p text:style-name="P26"><text:span text:style-name="T14">{{exam3}}</text:span><text:span text:style-name="T17"> </text:span></text:p>
          <text:p text:style-name="P26"><text:span text:style-name="T14">{{exam4}}</text:span><text:span text:style-name="T17"> </text:span></text:p>
          <text:p text:style-name="P26"><text:span text:style-name="T14">{{exam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0" draw:text-style-name="P13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8" draw:text-style-name="P10" draw:layer="layout" svg:width="5.79cm" svg:height="0.634cm" svg:x="1.3cm" svg:y="11.85cm">
          <text:p text:style-name="P9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0" draw:text-style-name="P13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9" draw:text-style-name="P15" draw:layer="layout" svg:width="12.085cm" svg:height="3.1cm" svg:x="1.25cm" svg:y="12.6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5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30" draw:text-style-name="P8" draw:layer="layout" svg:width="15.9cm" svg:height="2.85cm" svg:x="18.6cm" svg:y="9.2cm">
          <text:p text:style-name="P28"><text:span text:style-name="T2">ЕСТЕСТВЕННО-ТЕХНОЛОГИЧЕСКИЙ ИНСТИТУ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1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5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32" draw:text-style-name="P30" draw:layer="layout" svg:width="2.9cm" svg:height="1.88cm" svg:x="18.4cm" svg:y="13.22cm">
          <text:p text:style-name="P29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33" draw:text-style-name="P31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4" draw:text-style-name="P23" draw:layer="layout" svg:width="4.9cm" svg:height="0.863cm" svg:x="20.15cm" svg:y="13.68cm">
          <text:p text:style-name="P22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5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5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5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6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7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8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9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0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cm" svg:height="2.007cm" svg:x="13.9cm" svg:y="0.5cm">
          <draw:image xlink:href="Pictures/100000010000039400000397E2E63528.png" xlink:type="simple" xlink:show="embed" xlink:actuate="onLoad" draw:mime-type="image/png">
            <text:p/>
          </draw:image>
        </draw:frame>
        <draw:frame draw:style-name="gr3" draw:text-style-name="P3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41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2" draw:text-style-name="P33" draw:layer="layout" svg:width="2.599cm" svg:height="1.84cm" svg:x="18.677cm" svg:y="11.4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3" draw:text-style-name="P30" draw:layer="layout" svg:width="2.9cm" svg:height="1.88cm" svg:x="18.4cm" svg:y="15.22cm">
          <text:p text:style-name="P29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4" draw:text-style-name="P30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5" draw:text-style-name="P23" draw:layer="layout" svg:width="5.45cm" svg:height="0.863cm" svg:x="28.55cm" svg:y="15.681cm">
          <text:p text:style-name="P22"><text:span text:style-name="T21">профессорско-</text:span><text:span text:style-name="T21"><text:line-break/></text:span><text:span text:style-name="T21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6" draw:text-style-name="P23" draw:layer="layout" svg:width="4.9cm" svg:height="0.863cm" svg:x="20.95cm" svg:y="15.681cm">
          <text:p text:style-name="P22"><text:span text:style-name="T21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7" draw:text-style-name="P23" draw:layer="layout" svg:width="4.9cm" svg:height="0.863cm" svg:x="28.55cm" svg:y="13.681cm">
          <text:p text:style-name="P22"><text:span text:style-name="T21">профильных</text:span><text:span text:style-name="T21"><text:line-break/></text:span><text:span text:style-name="T21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8" draw:text-style-name="P30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.915cm" svg:height="1.915cm" svg:x="26.685cm" svg:y="5.68cm">
          <draw:image xlink:href="Pictures/100000000000078000000780597994D2.png" xlink:type="simple" xlink:show="embed" xlink:actuate="onLoad" draw:mime-type="image/png">
            <text:p/>
          </draw:image>
        </draw:frame>
        <draw:frame draw:style-name="gr3" draw:text-style-name="P3" draw:layer="layout" svg:width="1.915cm" svg:height="1.915cm" svg:x="30.621cm" svg:y="5.68cm">
          <draw:image xlink:href="Pictures/100000010000006B0000006B02222620.png" xlink:type="simple" xlink:show="embed" xlink:actuate="onLoad" draw:mime-type="image/png">
            <text:p/>
          </draw:image>
        </draw:frame>
        <draw:custom-shape draw:name="Text 5" draw:style-name="gr49" draw:text-style-name="P36" draw:layer="layout" svg:width="2.65cm" svg:height="1.364cm" svg:x="19.35cm" svg:y="7cm">
          <text:p text:style-name="P35"><text:span text:style-name="T14">{{photo2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0" draw:text-style-name="P36" draw:layer="layout" svg:width="2.65cm" svg:height="1.364cm" svg:x="23.55cm" svg:y="5.7cm">
          <text:p text:style-name="P35"><text:span text:style-name="T14">{{photo5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1" draw:text-style-name="P36" draw:layer="layout" svg:width="2.65cm" svg:height="1.364cm" svg:x="20.75cm" svg:y="5.7cm">
          <text:p text:style-name="P35"><text:span text:style-name="T14">{{photo3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2" draw:text-style-name="P36" draw:layer="layout" svg:width="2.65cm" svg:height="1.364cm" svg:x="22.05cm" svg:y="7cm">
          <text:p text:style-name="P35"><text:span text:style-name="T14">{{photo4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3" draw:text-style-name="P36" draw:layer="layout" svg:width="2.65cm" svg:height="1.364cm" svg:x="17.85cm" svg:y="5.7cm">
          <text:p text:style-name="P35"><text:span text:style-name="T14">{{photo1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4" draw:layer="layout" svg:width="15.239cm" svg:height="8.572cm" svg:x="1.905cm" svg:y="3.175cm" draw:page-number="1" presentation:class="page"/>
          <draw:frame draw:name="Notes Placeholder 2" presentation:style-name="pr1" draw:text-style-name="P3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9" draw:layer="layout" svg:width="8.254cm" svg:height="1.273cm" svg:x="10.791cm" svg:y="24.126cm" presentation:class="page-number" presentation:user-transformed="true">
            <draw:text-box>
              <text:p text:style-name="P38"><text:span text:style-name="T24"><text:page-number>&lt;номер&gt;</text:page-number></text:span><text:span text:style-name="T24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initial-creator>OpenAI</meta:initial-creator>
    <meta:editing-cycles>29</meta:editing-cycles>
    <meta:creation-date>2026-03-26T16:59:55</meta:creation-date>
    <dc:date>2026-04-22T21:06:11.550811100</dc:date>
    <meta:editing-duration>PT3H27M58S</meta:editing-duration>
    <meta:generator>LibreOffice/26.2.2.2$Windows_X86_64 LibreOffice_project/1f77d10d6938fd34972958f64b2bcfa54f8b1ba5</meta:generator>
    <meta:document-statistic meta:object-count="95"/>
    <meta:user-defined meta:name="AppVersion">16.0000</meta:user-defined>
    <meta:user-defined meta:name="Company">OpenAI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