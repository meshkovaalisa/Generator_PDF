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B58E61EA.png" manifest:media-type="image/png"/>
  <manifest:file-entry manifest:full-path="Pictures/10000001000001AA00000055F2CED9A8.png" manifest:media-type="image/png"/>
  <manifest:file-entry manifest:full-path="Pictures/10000001000004FC00000500973A5229.png" manifest:media-type="image/png"/>
  <manifest:file-entry manifest:full-path="Pictures/10000001000004FE000004FE6EEBD1E6.png" manifest:media-type="image/png"/>
  <manifest:file-entry manifest:full-path="Pictures/10000000000004830000048376E1D2FA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dc143c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dc143c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c143c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dc143c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dc143c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dc143c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dc143c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dc143c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dc143c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dc143c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647cm" svg:height="8.647cm" svg:x="8.753cm" svg:y="9.053cm">
          <draw:image xlink:href="Pictures/10000001000004FE000004FEB58E61EA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677cm" svg:y="11.4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2.037cm" svg:height="2.043cm" svg:x="13.906cm" svg:y="0.457cm">
          <draw:image xlink:href="Pictures/10000001000004FC00000500973A5229.png" xlink:type="simple" xlink:show="embed" xlink:actuate="onLoad" draw:mime-type="image/png">
            <text:p/>
          </draw:image>
        </draw:frame>
        <draw:frame draw:style-name="gr37" draw:text-style-name="P1" draw:layer="layout" svg:width="1.915cm" svg:height="1.915cm" svg:x="26.685cm" svg:y="5.68cm">
          <draw:image xlink:href="Pictures/10000001000004FE000004FE6EEBD1E6.png" xlink:type="simple" xlink:show="embed" xlink:actuate="onLoad" draw:mime-type="image/png">
            <text:p/>
          </draw:image>
        </draw:frame>
        <draw:frame draw:style-name="gr37" draw:text-style-name="P1" draw:layer="layout" svg:width="2.248cm" svg:height="2.248cm" svg:x="30.4cm" svg:y="5.5cm">
          <draw:image xlink:href="Pictures/10000000000004830000048376E1D2FA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0</meta:editing-cycles>
    <meta:creation-date>2026-03-26T16:59:55</meta:creation-date>
    <dc:date>2026-04-24T17:56:14.728923600</dc:date>
    <meta:editing-duration>PT4H9M7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