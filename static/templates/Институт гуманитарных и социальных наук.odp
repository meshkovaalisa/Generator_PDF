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31B40016.png" manifest:media-type="image/png"/>
  <manifest:file-entry manifest:full-path="Pictures/10000001000004FE000004FF7D3EB7EF.png" manifest:media-type="image/png"/>
  <manifest:file-entry manifest:full-path="Pictures/10000001000004FE000004FE24076CA5.png" manifest:media-type="image/png"/>
  <manifest:file-entry manifest:full-path="Pictures/10000001000001AA00000055F2CED9A8.png" manifest:media-type="image/png"/>
  <manifest:file-entry manifest:full-path="Pictures/10000001000004FE000004FE45ADDF82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5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76e00"/>
      <style:paragraph-properties fo:text-align="left"/>
      <style:text-properties fo:font-size="18pt"/>
    </style:style>
    <style:style style:name="P3" style:family="paragraph">
      <loext:graphic-properties draw:fill="solid" draw:fill-color="#ffffff"/>
      <style:paragraph-properties fo:text-align="left"/>
      <style:text-properties fo:font-size="18pt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d76e00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4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5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3" style:family="text">
      <style:text-properties fo:color="#00008b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6" style:family="text">
      <style:text-properties style:font-name="Arial" fo:font-size="18pt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8" style:family="text">
      <style:text-properties style:font-name="Arial" fo:font-size="13pt" style:font-size-asian="13pt" style:font-size-complex="13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21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24" style:family="text">
      <style:text-properties style:font-name="Arial" fo:font-size="28pt" style:font-size-asian="28pt" style:font-size-complex="28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34cm" svg:height="2.334cm" svg:x="30.277cm" svg:y="5.35cm">
          <draw:image xlink:href="Pictures/10000000000004830000048331B40016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8cm" svg:height="8cm" svg:x="9.393cm" svg:y="9.4cm">
          <draw:image xlink:href="Pictures/10000001000004FE000004FE24076CA5.png" xlink:type="simple" xlink:show="embed" xlink:actuate="onLoad" draw:mime-type="image/png">
            <text:p/>
          </draw:image>
        </draw:frame>
        <draw:custom-shape draw:name="Shape 3" draw:style-name="gr5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3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8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11" draw:layer="layout" svg:width="7.2cm" svg:height="4.7cm" svg:x="18.75cm" svg:y="1.15cm">
          <text:p text:style-name="P10"><text:span text:style-name="T5">{{abou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" draw:text-style-name="P15" draw:layer="layout" svg:width="5.6cm" svg:height="4cm" svg:x="27.6cm" svg:y="1.35cm">
          <text:p text:style-name="P14"><text:span text:style-name="T7">•</text:span><text:span text:style-name="T5"> {{study1}}</text:span><text:span text:style-name="T8"> </text:span></text:p>
          <text:p text:style-name="P14"><text:span text:style-name="T7">•</text:span><text:span text:style-name="T5"> {{study2}}</text:span><text:span text:style-name="T8"> </text:span></text:p>
          <text:p text:style-name="P14"><text:span text:style-name="T7">•</text:span><text:span text:style-name="T5"> {{study3}}</text:span><text:span text:style-name="T8"> </text:span></text:p>
          <text:p text:style-name="P14"><text:span text:style-name="T7">•</text:span><text:span text:style-name="T5"> {{study4}}</text:span><text:span text:style-name="T8"> </text:span></text:p>
          <text:p text:style-name="P14"><text:span text:style-name="T7">•</text:span><text:span text:style-name="T5"> {{study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6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" draw:text-style-name="P17" draw:layer="layout" svg:width="3.4cm" svg:height="0.8cm" svg:x="26cm" svg:y="7.68cm">
          <text:p text:style-name="P16"><text:span text:style-name="T9">Информация о программе и условиях поступления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9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9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9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9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9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6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9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0" draw:text-style-name="P19" draw:layer="layout" svg:width="2.9cm" svg:height="1.88cm" svg:x="18.4cm" svg:y="13.22cm">
          <text:p text:style-name="P18"><text:span text:style-name="T11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2" draw:text-style-name="P22" draw:layer="layout" svg:width="4.9cm" svg:height="0.863cm" svg:x="20.05cm" svg:y="13.68cm">
          <text:p text:style-name="P21"><text:span text:style-name="T12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3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4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5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6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7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8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9">Подписывайтесь на наши официальные каналы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1.26cm">
          <text:p text:style-name="P23"><text:span text:style-name="T13">ЭТО: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1">55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25"><text:span text:style-name="T11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8.55cm" svg:y="15.681cm">
          <text:p text:style-name="P21"><text:span text:style-name="T12">профессорско-</text:span><text:span text:style-name="T12"><text:line-break/></text:span><text:span text:style-name="T12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4.9cm" svg:height="0.863cm" svg:x="20.75cm" svg:y="15.681cm">
          <text:p text:style-name="P21"><text:span text:style-name="T12">студентов</text:span><text:span text:style-name="T12"><text:line-break/></text:span><text:span text:style-name="T12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8.55cm" svg:y="13.681cm">
          <text:p text:style-name="P21"><text:span text:style-name="T12">профильных</text:span><text:span text:style-name="T12"><text:line-break/></text:span><text:span text:style-name="T12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25"><text:span text:style-name="T11">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005cm" svg:height="2.007cm" svg:x="13.89cm" svg:y="0.5cm">
          <draw:image xlink:href="Pictures/10000001000004FE000004FF7D3EB7EF.png" xlink:type="simple" xlink:show="embed" xlink:actuate="onLoad" draw:mime-type="image/png">
            <text:p/>
          </draw:image>
        </draw:frame>
        <draw:frame draw:style-name="gr1" draw:text-style-name="P1" draw:layer="layout" svg:width="2.18cm" svg:height="2.18cm" svg:x="26.52cm" svg:y="5.5cm">
          <draw:image xlink:href="Pictures/10000001000004FE000004FE45ADDF82.png" xlink:type="simple" xlink:show="embed" xlink:actuate="onLoad" draw:mime-type="image/png">
            <text:p/>
          </draw:image>
        </draw:frame>
        <draw:custom-shape draw:name="Text 5" draw:style-name="gr37" draw:text-style-name="P13" draw:layer="layout" svg:width="3.047cm" svg:height="0.634cm" svg:x="13.651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" draw:text-style-name="P27" draw:layer="layout" svg:width="3.8cm" svg:height="1.6cm" svg:x="13.65cm" svg:y="9.75cm">
          <text:p text:style-name="P26"><text:span text:style-name="T15">{{VI_1}}</text:span><text:span text:style-name="T16"> </text:span></text:p>
          <text:p text:style-name="P26"><text:span text:style-name="T15">{{VI_2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9" draw:text-style-name="P29" draw:layer="layout" svg:width="3.8cm" svg:height="0.609cm" svg:x="13.65cm" svg:y="11.351cm">
          <text:p text:style-name="P28"><text:span text:style-name="T17">ЕГЭ на выбор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0" draw:text-style-name="P27" draw:layer="layout" svg:width="3.8cm" svg:height="2.276cm" svg:x="13.65cm" svg:y="11.95cm">
          <text:p text:style-name="P26"><text:span text:style-name="T15">{{VI_3}}</text:span><text:span text:style-name="T16"> </text:span></text:p>
          <text:p text:style-name="P26"><text:span text:style-name="T15">{{VI_4}}</text:span><text:span text:style-name="T16"> </text:span></text:p>
          <text:p text:style-name="P26"><text:span text:style-name="T15">{{VI_5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1" draw:text-style-name="P13" draw:layer="layout" svg:width="5.333cm" svg:height="0.634cm" svg:x="7.251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2" draw:text-style-name="P11" draw:layer="layout" svg:width="5.5cm" svg:height="0.814cm" svg:x="7.25cm" svg:y="9.936cm">
          <text:p text:style-name="P10"><text:span text:style-name="T15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3" draw:text-style-name="P11" draw:layer="layout" svg:width="5.5cm" svg:height="1.85cm" svg:x="7.25cm" svg:y="10.75cm">
          <text:p text:style-name="P10"><text:span text:style-name="T15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4" draw:text-style-name="P31" draw:layer="layout" svg:width="4.368cm" svg:height="0.634cm" svg:x="1.3cm" svg:y="9.25cm">
          <text:p text:style-name="P30"><text:span text:style-name="T19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5" draw:text-style-name="P11" draw:layer="layout" svg:width="5.7cm" svg:height="1.482cm" svg:x="1.3cm" svg:y="9.8cm">
          <text:p text:style-name="P10"><text:span text:style-name="T15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6" draw:text-style-name="P11" draw:layer="layout" svg:width="5.79cm" svg:height="0.634cm" svg:x="1.3cm" svg:y="13.55cm">
          <text:p text:style-name="P10"><text:span text:style-name="T20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7" draw:text-style-name="P13" draw:layer="layout" svg:width="12.085cm" svg:height="3.1cm" svg:x="1.251cm" svg:y="14.25cm">
          <text:p text:style-name="P12"><text:span text:style-name="T21">•</text:span><text:span text:style-name="T15"> {{opp1}}</text:span><text:span text:style-name="T6"> </text:span></text:p>
          <text:p text:style-name="P12"><text:span text:style-name="T21">•</text:span><text:span text:style-name="T15"> {{opp2}}</text:span><text:span text:style-name="T6"> </text:span></text:p>
          <text:p text:style-name="P12"><text:span text:style-name="T21">•</text:span><text:span text:style-name="T15"> {{opp3}}</text:span><text:span text:style-name="T6"> </text:span></text:p>
          <text:p text:style-name="P12"><text:span text:style-name="T21">•</text:span><text:span text:style-name="T15"> {{opp4}}</text:span><text:span text:style-name="T6"> </text:span></text:p>
          <text:p text:style-name="P12"><text:span text:style-name="T21">•</text:span><text:span text:style-name="T15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8" draw:text-style-name="P33" draw:layer="layout" svg:width="1.2cm" svg:height="0.8cm" svg:x="1.3cm" svg:y="12.2cm">
          <text:p text:style-name="P32"><text:span text:style-name="T15">{{budget_total}}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9" draw:text-style-name="P31" draw:layer="layout" svg:width="4.368cm" svg:height="0.634cm" svg:x="1.3cm" svg:y="11.55cm">
          <text:p text:style-name="P30"><text:span text:style-name="T19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0" draw:text-style-name="P33" draw:layer="layout" svg:width="1.2cm" svg:height="0.8cm" svg:x="1.3cm" svg:y="12.9cm">
          <text:p text:style-name="P32"><text:span text:style-name="T15">{{off_budgetl}}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51" draw:text-style-name="P11" draw:layer="layout" svg:width="3.5cm" svg:height="0.9cm" svg:x="2.1cm" svg:y="12.1cm">
          <text:p text:style-name="P10"><text:span text:style-name="T15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2" draw:text-style-name="P11" draw:layer="layout" svg:width="3.5cm" svg:height="0.9cm" svg:x="2.1cm" svg:y="12.8cm">
          <text:p text:style-name="P10"><text:span text:style-name="T15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3" draw:text-style-name="P35" draw:layer="layout" svg:width="15.9cm" svg:height="2.85cm" svg:x="18.6cm" svg:y="9.2cm">
          <text:p text:style-name="P34"><text:span text:style-name="T23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4" draw:text-style-name="P37" draw:layer="layout" svg:width="15.7cm" svg:height="3.513cm" svg:x="1.3cm" svg:y="2.751cm">
          <text:p text:style-name="P36"><text:span text:style-name="T23">{{program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5" draw:text-style-name="P11" draw:layer="layout" svg:width="7.5cm" svg:height="1cm" svg:x="1.3cm" svg:y="6.879cm">
          <text:p text:style-name="P10"><text:span text:style-name="T12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39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3</meta:editing-cycles>
    <meta:creation-date>2026-03-26T16:59:55</meta:creation-date>
    <dc:date>2026-04-22T21:10:03.992141100</dc:date>
    <meta:editing-duration>PT3H51M48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