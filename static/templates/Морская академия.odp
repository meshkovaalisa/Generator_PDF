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Thumbnails/thumbnail.png" manifest:media-type="image/png"/>
  <manifest:file-entry manifest:full-path="Pictures/1000000100000256000002563E26BCAC.png" manifest:media-type="image/png"/>
  <manifest:file-entry manifest:full-path="Pictures/10000001000001AA00000055F2CED9A8.png" manifest:media-type="image/png"/>
  <manifest:file-entry manifest:full-path="Pictures/100000010000025400000256C7CBF2F8.png" manifest:media-type="image/png"/>
  <manifest:file-entry manifest:full-path="Pictures/100000010000025600000256A16EAB2F.png" manifest:media-type="image/png"/>
  <manifest:file-entry manifest:full-path="Pictures/10000000000004830000048391D6C686.png" manifest:media-type="image/png"/>
  <manifest:file-entry manifest:full-path="meta.xml" manifest:media-type="text/xml"/>
  <manifest:file-entry manifest:full-path="settings.xml" manifest:media-type="text/xml"/>
  <manifest:file-entry manifest:full-path="Basic/Standard/test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+mn-cs" svg:font-family="+mn-cs"/>
    <style:font-face style:name="+mn-ea" svg:font-family="+mn-ea"/>
    <style:font-face style:name="+mn-lt" svg:font-family="+mn-lt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Open Sans" svg:font-family="'Open Sans'" style:font-family-generic="swiss" style:font-pitch="variable"/>
    <style:font-face style:name="Open Sans1" svg:font-family="'Open Sans'"/>
    <style:font-face style:name="Open Sans2" svg:font-family="'Open Sans'" style:font-family-generic="modern" style:font-pitch="fixed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solid" svg:stroke-width="0.035cm" svg:stroke-color="#006d5a" svg:stroke-opacity="0%" draw:fill="solid" draw:fill-color="#0095b6" draw:textarea-vertical-align="top" draw:auto-grow-height="false" fo:min-height="8.624cm" fo:min-width="17.28cm" fo:padding-top="0.125cm" fo:padding-bottom="0.125cm" fo:padding-left="0.25cm" fo:padding-right="0.25cm" fo:wrap-option="wrap" loext:decorative="false"/>
    </style:style>
    <style:style style:name="gr2" style:family="graphic" style:parent-style-name="standard">
      <style:graphic-properties draw:stroke="solid" svg:stroke-width="0.035cm" svg:stroke-color="#ffffff" svg:stroke-opacity="0%" draw:fill="solid" draw:fill-color="#ffffff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20%" style:mirror="none" loext:decorative="false"/>
    </style:style>
    <style:style style:name="gr4" style:family="graphic" style:parent-style-name="standard">
      <style:graphic-properties draw:stroke="solid" svg:stroke-width="0.035cm" svg:stroke-color="#006d5a" svg:stroke-opacity="0%" draw:fill="solid" draw:fill-color="#0095b6" draw:textarea-vertical-align="top" draw:auto-grow-height="false" fo:min-height="8.877cm" fo:min-width="17.28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5" style:family="graphic" style:parent-style-name="standard">
      <style:graphic-properties draw:stroke="none" svg:stroke-width="0.035cm" svg:stroke-color="#ffffff" svg:stroke-opacity="0%" draw:fill="solid" draw:fill-color="#006d5a" draw:opacity="0%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6" style:family="graphic" style:parent-style-name="standard">
      <style:graphic-properties draw:stroke="solid" svg:stroke-width="0.035cm" svg:stroke-color="#ffffff" svg:stroke-opacity="0%" draw:fill="solid" draw:fill-color="#ffffff" draw:textarea-vertical-align="top" draw:auto-grow-height="false" fo:min-height="0.26cm" fo:min-width="3.79cm" fo:padding-top="0.125cm" fo:padding-bottom="0.125cm" fo:padding-left="0.25cm" fo:padding-right="0.25cm" fo:wrap-option="wrap" loext:decorative="false"/>
    </style:style>
    <style:style style:name="gr7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.501cm" fo:min-width="3.1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8" style:family="graphic" style:parent-style-name="standard">
      <style:graphic-properties draw:stroke="none" svg:stroke-width="0.035cm" svg:stroke-color="#006d5a" svg:stroke-opacity="0%" draw:fill="solid" draw:fill-color="#ffffff" draw:opacity="0%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9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0" style:family="graphic" style:parent-style-name="standard">
      <style:graphic-properties draw:stroke="none" svg:stroke-width="0.035cm" svg:stroke-color="#006d5a" svg:stroke-opacity="0%" draw:fill="solid" draw:fill-color="#ffffff" draw:opacity="0%" draw:textarea-vertical-align="top" draw:auto-grow-height="false" fo:min-height="4.068cm" fo:min-width="6.815cm" fo:padding-top="0.125cm" fo:padding-bottom="0.125cm" fo:padding-left="0.25cm" fo:padding-right="0.25cm" fo:wrap-option="wrap" loext:decorative="false"/>
    </style:style>
    <style:style style:name="gr11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2" style:family="graphic" style:parent-style-name="standard">
      <style:graphic-properties draw:stroke="none" svg:stroke-width="0.035cm" svg:stroke-color="#006d5a" svg:stroke-opacity="0%" draw:fill="solid" draw:fill-color="#ffffff" draw:opacity="0%" draw:textarea-vertical-align="top" draw:auto-grow-height="false" fo:min-height="0.715cm" fo:min-width="5.291cm" fo:padding-top="0.125cm" fo:padding-bottom="0.125cm" fo:padding-left="0.25cm" fo:padding-right="0.25cm" fo:wrap-option="wrap" loext:decorative="false"/>
    </style:style>
    <style:style style:name="gr13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.813cm" fo:min-width="5.79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4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4.001cm" fo:min-width="5.6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5" style:family="graphic" style:parent-style-name="standard">
      <style:graphic-properties draw:stroke="none" svg:stroke-width="0.035cm" svg:stroke-color="#006d5a" svg:stroke-opacity="0%" draw:fill="solid" draw:fill-color="#ffffff" draw:opacity="0%" draw:textarea-vertical-align="top" draw:auto-grow-height="false" fo:min-height="0.614cm" fo:min-width="2.236cm" fo:padding-top="0.125cm" fo:padding-bottom="0.125cm" fo:padding-left="0.25cm" fo:padding-right="0.25cm" fo:wrap-option="wrap" loext:decorative="false"/>
    </style:style>
    <style:style style:name="gr16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.801cm" fo:min-width="3.4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7" style:family="graphic" style:parent-style-name="standard">
      <style:graphic-properties draw:stroke="none" svg:stroke-width="0.035cm" svg:stroke-color="#006d5a" svg:stroke-opacity="0%" draw:fill="solid" draw:fill-color="#ffffff" draw:opacity="0%" draw:textarea-vertical-align="top" draw:auto-grow-height="false" fo:min-height="1.015cm" fo:min-width="3.183cm" fo:padding-top="0.125cm" fo:padding-bottom="0.125cm" fo:padding-left="0.25cm" fo:padding-right="0.25cm" fo:wrap-option="wrap" loext:decorative="false"/>
    </style:style>
    <style:style style:name="gr18" style:family="graphic" style:parent-style-name="standard">
      <style:graphic-properties draw:stroke="none" svg:stroke-width="0.035cm" svg:stroke-color="#ffffff" svg:stroke-opacity="0%" draw:fill="solid" draw:fill-color="#006d5a" draw:opacity="0%" draw:textarea-vertical-align="top" draw:auto-grow-height="false" fo:min-height="2.29cm" fo:min-width="7.424cm" fo:padding-top="0.125cm" fo:padding-bottom="0.125cm" fo:padding-left="0.25cm" fo:padding-right="0.25cm" fo:wrap-option="wrap" loext:decorative="false"/>
    </style:style>
    <style:style style:name="gr19" style:family="graphic" style:parent-style-name="standard" style:list-style-name="L6">
      <style:graphic-properties draw:stroke="none" svg:stroke-width="0cm" draw:fill="none" loext:fill-use-slide-background="false" draw:textarea-horizontal-align="left" draw:textarea-vertical-align="middle" draw:auto-grow-height="false" draw:fit-to-size="false" style:shrink-to-fit="true" fo:min-height="1.881cm" fo:min-width="2.9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0" style:family="graphic" style:parent-style-name="standard">
      <style:graphic-properties draw:stroke="none" svg:stroke-width="0.035cm" svg:stroke-color="#ffffff" svg:stroke-opacity="0%" draw:fill="solid" draw:fill-color="#006d5a" draw:opacity="0%" draw:textarea-vertical-align="top" draw:auto-grow-height="false" fo:min-height="0.766cm" fo:min-width="2.331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1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.864cm" fo:min-width="4.9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2" style:family="graphic" style:parent-style-name="standard">
      <style:graphic-properties draw:stroke="none" svg:stroke-width="0.035cm" svg:stroke-color="#ffffff" svg:stroke-opacity="0%" draw:fill="solid" draw:fill-color="#006d5a" draw:opacity="0%" draw:textarea-vertical-align="top" draw:auto-grow-height="false" fo:min-height="2.29cm" fo:min-width="6.785cm" fo:padding-top="0.125cm" fo:padding-bottom="0.125cm" fo:padding-left="0.25cm" fo:padding-right="0.25cm" fo:wrap-option="wrap" loext:decorative="false"/>
    </style:style>
    <style:style style:name="gr23" style:family="graphic" style:parent-style-name="standard">
      <style:graphic-properties draw:stroke="none" svg:stroke-width="0.035cm" svg:stroke-color="#ffffff" svg:stroke-opacity="0%" draw:fill="solid" draw:fill-color="#006d5a" draw:opacity="0%" draw:textarea-vertical-align="top" draw:auto-grow-height="false" fo:min-height="2.062cm" fo:min-width="7.424cm" fo:padding-top="0.125cm" fo:padding-bottom="0.125cm" fo:padding-left="0.25cm" fo:padding-right="0.25cm" fo:wrap-option="wrap" loext:decorative="false"/>
    </style:style>
    <style:style style:name="gr24" style:family="graphic" style:parent-style-name="standard">
      <style:graphic-properties draw:stroke="none" svg:stroke-width="0.035cm" svg:stroke-color="#ffffff" svg:stroke-opacity="0%" draw:fill="solid" draw:fill-color="#006d5a" draw:opacity="0%" draw:textarea-vertical-align="top" draw:auto-grow-height="false" fo:min-height="0.802cm" fo:min-width="2.331cm" fo:padding-top="0.125cm" fo:padding-bottom="0.125cm" fo:padding-left="0.25cm" fo:padding-right="0.25cm" fo:wrap-option="wrap" loext:decorative="false"/>
    </style:style>
    <style:style style:name="gr25" style:family="graphic" style:parent-style-name="standard">
      <style:graphic-properties draw:stroke="none" svg:stroke-width="0.035cm" svg:stroke-color="#ffffff" svg:stroke-opacity="0%" draw:fill="solid" draw:fill-color="#006d5a" draw:opacity="0%" draw:textarea-vertical-align="top" draw:auto-grow-height="false" fo:min-height="2.062cm" fo:min-width="6.801cm" fo:padding-top="0.125cm" fo:padding-bottom="0.125cm" fo:padding-left="0.25cm" fo:padding-right="0.25cm" fo:wrap-option="wrap" loext:decorative="false"/>
    </style:style>
    <style:style style:name="gr26" style:family="graphic" style:parent-style-name="standard">
      <style:graphic-properties draw:stroke="none" svg:stroke-width="0.035cm" svg:stroke-color="#ffffff" svg:stroke-opacity="0%" draw:fill="solid" draw:fill-color="#006d5a" draw:opacity="0%" draw:textarea-vertical-align="top" draw:auto-grow-height="false" fo:min-height="0.65cm" fo:min-width="1.735cm" fo:padding-top="0.125cm" fo:padding-bottom="0.125cm" fo:padding-left="0.25cm" fo:padding-right="0.25cm" fo:wrap-option="wrap" loext:decorative="false"/>
    </style:style>
    <style:style style:name="gr27" style:family="graphic" style:parent-style-name="standard">
      <style:graphic-properties draw:stroke="none" svg:stroke-width="0.035cm" svg:stroke-color="#ffffff" svg:stroke-opacity="0%" draw:fill="solid" draw:fill-color="#006d5a" draw:opacity="0%" draw:textarea-vertical-align="top" draw:auto-grow-height="false" fo:min-height="0.817cm" fo:min-width="2.326cm" fo:padding-top="0.125cm" fo:padding-bottom="0.125cm" fo:padding-left="0.25cm" fo:padding-right="0.25cm" fo:wrap-option="wrap" loext:decorative="false"/>
    </style:style>
    <style:style style:name="gr2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9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.801cm" fo:min-width="3.4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0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1.841cm" fo:min-width="2.6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1" style:family="graphic" style:parent-style-name="standard" style:list-style-name="L6">
      <style:graphic-properties draw:stroke="none" svg:stroke-width="0cm" draw:fill="none" loext:fill-use-slide-background="false" draw:textarea-horizontal-align="center" draw:textarea-vertical-align="middle" draw:auto-grow-height="false" draw:fit-to-size="false" style:shrink-to-fit="true" fo:min-height="1.881cm" fo:min-width="2.9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2" style:family="graphic" style:parent-style-name="standard" style:list-style-name="L6">
      <style:graphic-properties draw:stroke="none" svg:stroke-width="0cm" draw:fill="none" loext:fill-use-slide-background="false" draw:textarea-horizontal-align="left" draw:textarea-vertical-align="middle" draw:auto-grow-height="false" draw:fit-to-size="false" style:shrink-to-fit="true" fo:min-height="1.881cm" fo:min-width="2.9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3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.864cm" fo:min-width="5.75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4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.864cm" fo:min-width="4.9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5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.864cm" fo:min-width="4.9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6" style:family="graphic" style:parent-style-name="standard" style:list-style-name="L6">
      <style:graphic-properties draw:stroke="none" svg:stroke-width="0cm" draw:fill="none" loext:fill-use-slide-background="false" draw:textarea-horizontal-align="left" draw:textarea-vertical-align="middle" draw:auto-grow-height="false" draw:fit-to-size="false" style:shrink-to-fit="true" fo:min-height="1.881cm" fo:min-width="2.9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7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3.514cm" fo:min-width="15.7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8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.635cm" fo:min-width="4.369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9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.483cm" fo:min-width="5.7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0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.635cm" fo:min-width="5.334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1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.635cm" fo:min-width="3.048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2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.61cm" fo:min-width="3.8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3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2.277cm" fo:min-width="3.8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4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.635cm" fo:min-width="5.79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5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3.101cm" fo:min-width="12.086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6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2.851cm" fo:min-width="15.9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7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.851cm" fo:min-width="5.5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8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1.001cm" fo:min-width="7.5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9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.601cm" fo:min-width="3.8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50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0.815cm" fo:min-width="5.5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51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.635cm" fo:min-width="4.369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52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0.801cm" fo:min-width="1.2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53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0.801cm" fo:min-width="1.2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54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0.901cm" fo:min-width="3.5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55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0.901cm" fo:min-width="3.5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56" style:family="graphic">
      <style:graphic-properties style:protect="size" loext:decorative="false"/>
    </style:style>
    <style:style style:name="pr1" style:family="presentation" style:parent-style-name="DEFAULT-notes" style:list-style-name="L8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6.002cm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DEFAULT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6.002cm" fo:padding-top="0.127cm" fo:padding-bottom="0.127cm" fo:padding-left="0.254cm" fo:padding-right="0.254cm" fo:wrap-option="wrap" loext:decorative="false"/>
      <style:paragraph-properties style:writing-mode="lr-tb"/>
    </style:style>
    <style:style style:name="P1" style:family="paragraph">
      <loext:graphic-properties draw:fill="solid" draw:fill-color="#0095b6"/>
      <style:paragraph-properties fo:text-align="left"/>
      <style:text-properties fo:font-size="18pt"/>
    </style:style>
    <style:style style:name="P2" style:family="paragraph">
      <loext:graphic-properties draw:fill="solid" draw:fill-color="#ffffff"/>
      <style:paragraph-properties fo:text-align="left"/>
      <style:text-properties fo:font-size="1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left" style:writing-mode="lr-tb"/>
      <style:text-properties fo:font-size="18pt"/>
    </style:style>
    <style:style style:name="P5" style:family="paragraph">
      <loext:graphic-properties draw:fill="solid" draw:fill-color="#0095b6"/>
      <style:paragraph-properties fo:text-align="left" style:writing-mode="lr-tb"/>
      <style:text-properties fo:font-size="18pt"/>
    </style:style>
    <style:style style:name="P6" style:family="paragraph">
      <loext:graphic-properties draw:fill="solid" draw:fill-color="#006d5a" draw:opacity="0%"/>
      <style:paragraph-properties fo:text-align="left"/>
      <style:text-properties fo:font-size="18pt"/>
    </style:style>
    <style:style style:name="P7" style:family="paragraph">
      <style:paragraph-properties fo:margin-left="0cm" fo:margin-right="0cm" fo:margin-top="0cm" fo:margin-bottom="0cm" fo:line-height="100%" fo:text-align="center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fo:color="#0095b6" loext:opacity="100%" fo:font-size="18pt" fo:hyphenate="false"/>
    </style:style>
    <style:style style:name="P8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fo:color="#0095b6" loext:opacity="100%" fo:font-size="18pt" fo:hyphenate="false"/>
    </style:style>
    <style:style style:name="P9" style:family="paragraph">
      <loext:graphic-properties draw:fill="solid" draw:fill-color="#ffffff" draw:opacity="0%"/>
      <style:paragraph-properties fo:text-align="left"/>
      <style:text-properties fo:font-size="18pt"/>
    </style:style>
    <style:style style:name="P10" style:family="paragraph">
      <style:paragraph-properties fo:margin-left="0cm" fo:margin-right="0cm" fo:margin-top="0cm" fo:margin-bottom="0cm" fo:line-height="100%" fo:text-align="lef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11" style:family="paragraph">
      <loext:graphic-properties draw:fill="none"/>
      <style:paragraph-properties fo:margin-left="0cm" fo:margin-right="0cm" fo:margin-top="0cm" fo:margin-bottom="0cm" fo:line-height="100%" fo:text-align="left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12" style:family="paragraph">
      <style:paragraph-properties fo:margin-left="0cm" fo:margin-right="0cm" fo:margin-top="0cm" fo:margin-bottom="0cm" fo:line-height="100%" fo:text-align="lef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style:font-name="Arial" fo:font-size="14pt" style:font-size-asian="14pt" style:font-size-complex="14pt" fo:hyphenate="false"/>
    </style:style>
    <style:style style:name="P13" style:family="paragraph">
      <loext:graphic-properties draw:fill="none"/>
      <style:paragraph-properties fo:margin-left="0cm" fo:margin-right="0cm" fo:margin-top="0cm" fo:margin-bottom="0cm" fo:line-height="100%" fo:text-align="left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style:font-name="Arial" fo:font-size="14pt" style:font-size-asian="14pt" style:font-size-complex="14pt" fo:hyphenate="false"/>
    </style:style>
    <style:style style:name="P14" style:family="paragraph">
      <style:paragraph-properties fo:margin-left="0cm" fo:margin-right="0cm" fo:margin-top="0cm" fo:margin-bottom="0cm" fo:line-height="100%" fo:text-align="lef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style:font-name="Arial" fo:font-size="12pt" style:font-size-asian="12pt" style:font-size-complex="12pt" fo:hyphenate="false"/>
    </style:style>
    <style:style style:name="P15" style:family="paragraph">
      <loext:graphic-properties draw:fill="none"/>
      <style:paragraph-properties fo:margin-left="0cm" fo:margin-right="0cm" fo:margin-top="0cm" fo:margin-bottom="0cm" fo:line-height="100%" fo:text-align="left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style:font-name="Arial" fo:font-size="12pt" style:font-size-asian="12pt" style:font-size-complex="12pt" fo:hyphenate="false"/>
    </style:style>
    <style:style style:name="P16" style:family="paragraph">
      <style:paragraph-properties fo:margin-left="0cm" fo:margin-right="0cm" fo:margin-top="0cm" fo:margin-bottom="0cm" fo:line-height="0.3cm" fo:text-align="center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P17" style:family="paragraph">
      <loext:graphic-properties draw:fill="none"/>
      <style:paragraph-properties fo:margin-left="0cm" fo:margin-right="0cm" fo:margin-top="0cm" fo:margin-bottom="0cm" fo:line-height="0.3cm" fo:text-align="center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P18" style:family="paragraph">
      <style:paragraph-properties fo:margin-left="0cm" fo:margin-right="0cm" fo:margin-top="0cm" fo:margin-bottom="0cm" fo:line-height="100%" fo:text-align="lef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style:font-name="Arial" fo:font-size="32pt" style:font-size-asian="32pt" style:font-size-complex="32pt" fo:hyphenate="false"/>
    </style:style>
    <style:style style:name="P19" style:family="paragraph">
      <loext:graphic-properties draw:fill="none"/>
      <style:paragraph-properties fo:margin-left="0cm" fo:margin-right="0cm" fo:margin-top="0cm" fo:margin-bottom="0cm" fo:line-height="100%" fo:text-align="left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style:font-name="Arial" fo:font-size="32pt" style:font-size-asian="32pt" style:font-size-complex="32pt" fo:hyphenate="false"/>
    </style:style>
    <style:style style:name="P20" style:family="paragraph">
      <loext:graphic-properties draw:fill="solid" draw:fill-color="#006d5a" draw:opacity="0%"/>
      <style:paragraph-properties fo:text-align="left" style:writing-mode="lr-tb"/>
      <style:text-properties fo:font-size="18pt"/>
    </style:style>
    <style:style style:name="P21" style:family="paragraph">
      <style:paragraph-properties fo:margin-left="0cm" fo:margin-right="0cm" fo:margin-top="0cm" fo:margin-bottom="0cm" fo:line-height="100%" fo:text-align="lef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fo:font-size="14pt" fo:font-weight="bold" style:font-size-asian="14pt" style:font-weight-asian="bold" style:font-size-complex="14pt" style:font-weight-complex="bold" fo:hyphenate="false"/>
    </style:style>
    <style:style style:name="P22" style:family="paragraph">
      <loext:graphic-properties draw:fill="none"/>
      <style:paragraph-properties fo:margin-left="0cm" fo:margin-right="0cm" fo:margin-top="0cm" fo:margin-bottom="0cm" fo:line-height="100%" fo:text-align="left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4pt" fo:font-weight="bold" style:font-size-asian="14pt" style:font-weight-asian="bold" style:font-size-complex="14pt" style:font-weight-complex="bold" fo:hyphenate="false"/>
    </style:style>
    <style:style style:name="P23" style:family="paragraph">
      <style:paragraph-properties fo:margin-left="0cm" fo:margin-right="0cm" fo:margin-top="0cm" fo:margin-bottom="0cm" fo:line-height="100%" fo:text-align="lef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style:font-name="Arial" fo:font-size="28pt" fo:font-weight="bold" style:font-size-asian="28pt" style:font-weight-asian="bold" style:font-size-complex="28pt" style:font-weight-complex="bold" fo:hyphenate="false"/>
    </style:style>
    <style:style style:name="P24" style:family="paragraph">
      <loext:graphic-properties draw:fill="none"/>
      <style:paragraph-properties fo:margin-left="0cm" fo:margin-right="0cm" fo:margin-top="0cm" fo:margin-bottom="0cm" fo:line-height="100%" fo:text-align="left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style:font-name="Arial" fo:font-size="28pt" fo:font-weight="bold" style:font-size-asian="28pt" style:font-weight-asian="bold" style:font-size-complex="28pt" style:font-weight-complex="bold" fo:hyphenate="false"/>
    </style:style>
    <style:style style:name="P25" style:family="paragraph">
      <style:paragraph-properties fo:margin-left="0cm" fo:margin-right="0cm" fo:margin-top="0cm" fo:margin-bottom="0cm" fo:line-height="100%" fo:text-align="center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style:font-name="Arial" fo:font-size="32pt" style:font-size-asian="32pt" style:font-size-complex="32pt" fo:hyphenate="false"/>
    </style:style>
    <style:style style:name="P26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style:font-name="Arial" fo:font-size="32pt" style:font-size-asian="32pt" style:font-size-complex="32pt" fo:hyphenate="false"/>
    </style:style>
    <style:style style:name="P27" style:family="paragraph">
      <style:paragraph-properties fo:margin-left="0cm" fo:margin-right="0cm" fo:margin-top="0cm" fo:margin-bottom="0cm" fo:line-height="100%" fo:text-align="lef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style:font-name="Arial" fo:font-size="28pt" style:font-size-asian="28pt" style:font-size-complex="28pt" fo:hyphenate="false"/>
    </style:style>
    <style:style style:name="P28" style:family="paragraph">
      <loext:graphic-properties draw:fill="none"/>
      <style:paragraph-properties fo:margin-left="0cm" fo:margin-right="0cm" fo:margin-top="0cm" fo:margin-bottom="0cm" fo:line-height="100%" fo:text-align="left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style:font-name="Arial" fo:font-size="28pt" style:font-size-asian="28pt" style:font-size-complex="28pt" fo:hyphenate="false"/>
    </style:style>
    <style:style style:name="P29" style:family="paragraph">
      <style:paragraph-properties fo:margin-left="0cm" fo:margin-right="0cm" fo:margin-top="0cm" fo:margin-bottom="0cm" fo:line-height="100%" fo:text-align="lef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style:text-outline="false" style:font-name="Arial" fo:font-size="14pt" fo:text-shadow="none" fo:font-weight="bold" style:font-size-asian="14pt" style:font-weight-asian="bold" style:font-size-complex="14pt" style:font-weight-complex="bold" fo:hyphenate="false"/>
    </style:style>
    <style:style style:name="P30" style:family="paragraph">
      <loext:graphic-properties draw:fill="none"/>
      <style:paragraph-properties fo:margin-left="0cm" fo:margin-right="0cm" fo:margin-top="0cm" fo:margin-bottom="0cm" fo:line-height="100%" fo:text-align="left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style:text-outline="false" style:font-name="Arial" fo:font-size="14pt" fo:text-shadow="none" fo:font-weight="bold" style:font-size-asian="14pt" style:font-weight-asian="bold" style:font-size-complex="14pt" style:font-weight-complex="bold" fo:hyphenate="false"/>
    </style:style>
    <style:style style:name="P31" style:family="paragraph">
      <style:paragraph-properties fo:margin-left="0cm" fo:margin-right="0cm" fo:margin-top="0cm" fo:margin-bottom="0cm" fo:line-height="100%" fo:text-align="lef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style:font-name="Arial" fo:font-size="13pt" style:font-size-asian="13pt" style:font-size-complex="13pt" fo:hyphenate="false"/>
    </style:style>
    <style:style style:name="P32" style:family="paragraph">
      <loext:graphic-properties draw:fill="none"/>
      <style:paragraph-properties fo:margin-left="0cm" fo:margin-right="0cm" fo:margin-top="0cm" fo:margin-bottom="0cm" fo:line-height="100%" fo:text-align="left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style:font-name="Arial" fo:font-size="13pt" style:font-size-asian="13pt" style:font-size-complex="13pt" fo:hyphenate="false"/>
    </style:style>
    <style:style style:name="P33" style:family="paragraph">
      <style:paragraph-properties fo:margin-left="0cm" fo:margin-right="0cm" fo:margin-top="0cm" fo:margin-bottom="0cm" fo:line-height="100%" fo:text-align="lef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style:font-name="Arial" fo:font-size="18pt" fo:hyphenate="false"/>
    </style:style>
    <style:style style:name="P34" style:family="paragraph">
      <loext:graphic-properties draw:fill="none"/>
      <style:paragraph-properties fo:margin-left="0cm" fo:margin-right="0cm" fo:margin-top="0cm" fo:margin-bottom="0cm" fo:line-height="100%" fo:text-align="left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style:font-name="Arial" fo:font-size="18pt" fo:hyphenate="false"/>
    </style:style>
    <style:style style:name="P35" style:family="paragraph">
      <style:paragraph-properties fo:margin-left="0cm" fo:margin-right="0cm" fo:margin-top="0.42cm" fo:margin-bottom="0.35cm" fo:line-height="100%" fo:text-align="lef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style:font-name="Arial" fo:font-size="28pt" style:font-size-asian="28pt" style:font-size-complex="28pt" fo:hyphenate="false"/>
    </style:style>
    <style:style style:name="P36" style:family="paragraph">
      <loext:graphic-properties draw:fill="none"/>
      <style:paragraph-properties fo:margin-left="0cm" fo:margin-right="0cm" fo:margin-top="0.42cm" fo:margin-bottom="0.35cm" fo:line-height="100%" fo:text-align="left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style:font-name="Arial" fo:font-size="28pt" style:font-size-asian="28pt" style:font-size-complex="28pt" fo:hyphenate="false"/>
    </style:style>
    <style:style style:name="P37" style:family="paragraph">
      <style:paragraph-properties fo:margin-left="0cm" fo:margin-right="0cm" fo:margin-top="0cm" fo:margin-bottom="0cm" fo:line-height="100%" fo:text-align="lef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fo:font-size="18pt" fo:font-weight="normal" style:font-weight-asian="normal" style:font-weight-complex="normal" fo:hyphenate="false"/>
    </style:style>
    <style:style style:name="P38" style:family="paragraph">
      <loext:graphic-properties draw:fill="none"/>
      <style:paragraph-properties fo:margin-left="0cm" fo:margin-right="0cm" fo:margin-top="0cm" fo:margin-bottom="0cm" fo:line-height="100%" fo:text-align="left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8pt" fo:font-weight="normal" style:font-weight-asian="normal" style:font-weight-complex="normal" fo:hyphenate="false"/>
    </style:style>
    <style:style style:name="P39" style:family="paragraph">
      <loext:graphic-properties draw:fill="none" draw:fill-color="#ffffff"/>
      <style:paragraph-properties fo:margin-left="0cm" fo:margin-right="0cm" fo:margin-top="0cm" fo:margin-bottom="0cm" fo:line-height="100%" fo:text-align="left" fo:text-indent="0cm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P40" style:family="paragraph">
      <style:paragraph-properties fo:margin-left="0cm" fo:margin-right="0cm" fo:margin-top="0cm" fo:margin-bottom="0cm" fo:line-height="100%" fo:text-align="right" fo:text-indent="0cm" style:punctuation-wrap="hanging" loext:tab-stop-distance="0cm" style:writing-mode="lr-tb">
        <style:tab-stops/>
      </style:paragraph-properties>
      <style:text-properties fo:font-size="12pt" style:font-size-asian="14pt" style:font-size-complex="14pt" fo:hyphenate="false"/>
    </style:style>
    <style:style style:name="P41" style:family="paragraph">
      <loext:graphic-properties draw:fill="none" draw:fill-color="#ffffff"/>
      <style:paragraph-properties fo:text-align="left" style:font-independent-line-spacing="true"/>
      <style:text-properties fo:font-size="12pt" style:font-size-asian="14pt" style:font-size-complex="14pt"/>
    </style:style>
    <style:style style:name="T1" style:family="text">
      <style:text-properties fo:font-size="18pt"/>
    </style:style>
    <style:style style:name="T2" style:family="text">
      <style:text-properties fo:font-variant="normal" fo:text-transform="none" fo:color="#0095b6" loext:opacity="100%" style:text-outline="false" style:text-line-through-style="none" style:text-line-through-type="none" style:text-position="0% 100%" style:font-name="Arial" fo:font-size="13.5pt" fo:letter-spacing="normal" fo:language="en" fo:country="US" fo:font-style="normal" style:text-underline-style="none" fo:font-weight="bold" fo:background-color="transparent" style:font-name-asian="Open Sans2" style:font-size-asian="13.5pt" style:font-style-asian="normal" style:font-weight-asian="bold" style:font-name-complex="Open Sans" style:font-size-complex="13.5pt" style:font-style-complex="normal" style:font-weight-complex="bold"/>
    </style:style>
    <style:style style:name="T3" style:family="text">
      <style:text-properties fo:color="#0095b6" loext:opacity="100%" fo:font-size="18pt"/>
    </style:style>
    <style:style style:name="T4" style:family="text">
      <style:text-properties fo:font-variant="normal" fo:text-transform="none" fo:color="#111111" loext:opacity="100%" style:text-outline="false" style:text-line-through-style="none" style:text-line-through-type="none" style:text-position="0% 100%" style:font-name="Arial" fo:font-size="14pt" fo:letter-spacing="normal" fo:language="en" fo:country="US" fo:font-style="normal" style:text-underline-style="none" fo:font-weight="bold" fo:background-color="transparent" style:font-name-asian="Open Sans2" style:font-size-asian="14pt" style:font-style-asian="normal" style:font-weight-asian="bold" style:font-name-complex="Open Sans" style:font-size-complex="14pt" style:font-style-complex="normal" style:font-weight-complex="bold"/>
    </style:style>
    <style:style style:name="T5" style:family="text">
      <style:text-properties fo:font-variant="normal" fo:text-transform="none" fo:color="#333333" loext:opacity="100%" style:text-outline="false" style:text-line-through-style="none" style:text-line-through-type="none" style:text-position="0% 100%" style:font-name="Arial" fo:font-size="12pt" fo:letter-spacing="normal" fo:language="en" fo:country="US" fo:font-style="normal" style:text-underline-style="none" fo:font-weight="normal" fo:background-color="transparent" style:font-name-asian="Open Sans2" style:font-size-asian="12pt" style:font-style-asian="normal" style:font-weight-asian="normal" style:font-name-complex="Open Sans" style:font-size-complex="12pt" style:font-style-complex="normal" style:font-weight-complex="normal"/>
    </style:style>
    <style:style style:name="T6" style:family="text">
      <style:text-properties style:font-name="Arial" fo:font-size="14pt" style:font-size-asian="14pt" style:font-size-complex="14pt"/>
    </style:style>
    <style:style style:name="T7" style:family="text">
      <style:text-properties fo:font-variant="normal" fo:text-transform="none" fo:color="#0095b6" loext:opacity="100%" style:text-outline="false" style:text-line-through-style="none" style:text-line-through-type="none" style:text-position="0% 100%" style:font-name="Arial" fo:font-size="12pt" fo:letter-spacing="normal" fo:language="en" fo:country="US" fo:font-style="normal" style:text-underline-style="none" fo:font-weight="normal" fo:background-color="transparent" style:font-name-asian="Open Sans2" style:font-size-asian="12pt" style:font-style-asian="normal" style:font-weight-asian="normal" style:font-name-complex="Open Sans" style:font-size-complex="12pt" style:font-style-complex="normal" style:font-weight-complex="normal"/>
    </style:style>
    <style:style style:name="T8" style:family="text">
      <style:text-properties fo:font-variant="normal" fo:text-transform="none" fo:color="#444444" loext:opacity="100%" style:text-outline="false" style:text-line-through-style="none" style:text-line-through-type="none" style:text-position="0% 100%" style:font-name="Open Sans" fo:font-size="8pt" fo:letter-spacing="normal" fo:language="en" fo:country="US" fo:font-style="normal" fo:text-shadow="none" style:text-underline-style="none" fo:font-weight="normal" style:letter-kerning="true" fo:background-color="transparent" style:font-name-asian="Open Sans2" style:font-size-asian="8pt" style:font-style-asian="normal" style:font-weight-asian="normal" style:font-name-complex="Open Sans" style:font-size-complex="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Noto Sans CJK SC" style:font-size-asian="16pt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Open Sans" fo:font-size="32pt" fo:letter-spacing="normal" fo:language="en" fo:country="US" fo:font-style="normal" style:text-underline-style="none" fo:font-weight="bold" fo:background-color="transparent" style:font-name-asian="Open Sans2" style:font-size-asian="32pt" style:font-style-asian="normal" style:font-weight-asian="bold" style:font-name-complex="Open Sans" style:font-size-complex="32pt" style:font-style-complex="normal" style:font-weight-complex="bold"/>
    </style:style>
    <style:style style:name="T11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14pt" fo:letter-spacing="normal" fo:language="en" fo:country="US" fo:font-style="normal" style:text-underline-style="none" fo:font-weight="bold" fo:background-color="transparent" style:font-name-asian="Open Sans2" style:font-size-asian="14pt" style:font-style-asian="normal" style:font-weight-asian="bold" style:font-name-complex="Open Sans" style:font-size-complex="14pt" style:font-style-complex="normal" style:font-weight-complex="bold"/>
    </style:style>
    <style:style style:name="T1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24pt" fo:letter-spacing="normal" fo:language="en" fo:country="US" fo:font-style="normal" style:text-underline-style="none" fo:font-weight="normal" fo:background-color="transparent" style:font-name-asian="Open Sans2" style:font-size-asian="24pt" style:font-style-asian="normal" style:font-weight-asian="normal" style:font-name-complex="Open Sans" style:font-size-complex="24pt" style:font-style-complex="normal" style:font-weight-complex="normal"/>
    </style:style>
    <style:style style:name="T13" style:family="text">
      <style:text-properties style:font-name="Arial" fo:font-size="28pt" fo:font-weight="bold" style:font-size-asian="28pt" style:font-weight-asian="bold" style:font-size-complex="28pt" style:font-weight-complex="bold"/>
    </style:style>
    <style:style style:name="T14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28pt" fo:letter-spacing="normal" fo:language="en" fo:country="US" fo:font-style="normal" style:text-underline-style="none" fo:font-weight="bold" fo:background-color="transparent" style:font-name-asian="Open Sans2" style:font-size-asian="28pt" style:font-style-asian="normal" style:font-weight-asian="bold" style:font-name-complex="Open Sans" style:font-size-complex="28pt" style:font-style-complex="normal" style:font-weight-complex="bold"/>
    </style:style>
    <style:style style:name="T15" style:family="text">
      <style:text-properties style:font-name="Arial" fo:font-size="28pt" style:font-size-asian="28pt" style:font-size-complex="28pt"/>
    </style:style>
    <style:style style:name="T16" style:family="text">
      <style:text-properties fo:font-variant="normal" fo:text-transform="none" fo:color="#111111" loext:opacity="100%" style:text-outline="false" style:text-line-through-style="none" style:text-line-through-type="none" style:text-position="0% 100%" style:font-name="Arial" fo:font-size="14pt" fo:letter-spacing="normal" fo:language="en" fo:country="US" fo:font-style="normal" fo:text-shadow="none" style:text-underline-style="none" fo:font-weight="bold" fo:background-color="transparent" style:font-name-asian="Open Sans2" style:font-size-asian="14pt" style:font-style-asian="normal" style:font-weight-asian="bold" style:font-name-complex="Open Sans" style:font-size-complex="14pt" style:font-style-complex="normal" style:font-weight-complex="bold"/>
    </style:style>
    <style:style style:name="T17" style:family="text">
      <style:text-properties fo:font-variant="normal" fo:text-transform="none" fo:color="#303030" loext:opacity="100%" style:text-outline="false" style:text-line-through-style="none" style:text-line-through-type="none" style:text-position="0% 100%" style:font-name="Arial" fo:font-size="14pt" fo:letter-spacing="normal" fo:language="en" fo:country="US" fo:font-style="normal" style:text-underline-style="none" fo:font-weight="normal" fo:background-color="transparent" style:font-name-asian="Open Sans2" style:font-size-asian="14pt" style:font-style-asian="normal" style:font-weight-asian="normal" style:font-name-complex="Open Sans" style:font-size-complex="14pt" style:font-style-complex="normal" style:font-weight-complex="normal"/>
    </style:style>
    <style:style style:name="T18" style:family="text">
      <style:text-properties fo:font-variant="normal" fo:text-transform="none" fo:color="#111111" loext:opacity="100%" style:text-outline="false" style:text-line-through-style="none" style:text-line-through-type="none" style:text-position="0% 100%" style:font-name="Arial" fo:font-size="13pt" fo:letter-spacing="normal" fo:language="en" fo:country="US" fo:font-style="normal" style:text-underline-style="none" fo:font-weight="bold" fo:background-color="transparent" style:font-name-asian="Open Sans2" style:font-size-asian="13pt" style:font-style-asian="normal" style:font-weight-asian="bold" style:font-name-complex="Open Sans" style:font-size-complex="13pt" style:font-style-complex="normal" style:font-weight-complex="bold"/>
    </style:style>
    <style:style style:name="T19" style:family="text">
      <style:text-properties style:font-name="Arial" fo:font-size="13pt" style:font-size-asian="13pt" style:font-size-complex="13pt"/>
    </style:style>
    <style:style style:name="T20" style:family="text">
      <style:text-properties style:font-name="Arial" fo:font-size="18pt"/>
    </style:style>
    <style:style style:name="T21" style:family="text">
      <style:text-properties fo:font-variant="normal" fo:text-transform="none" fo:color="#111111" loext:opacity="100%" style:text-outline="false" style:text-line-through-style="none" style:text-line-through-type="none" style:text-position="0% 100%" style:font-name="Arial" fo:font-size="17pt" fo:letter-spacing="normal" fo:language="en" fo:country="US" fo:font-style="normal" style:text-underline-style="none" fo:font-weight="bold" fo:background-color="transparent" style:font-name-asian="Open Sans2" style:font-size-asian="17pt" style:font-style-asian="normal" style:font-weight-asian="bold" style:font-name-complex="Open Sans" style:font-size-complex="17pt" style:font-style-complex="normal" style:font-weight-complex="bold"/>
    </style:style>
    <style:style style:name="T22" style:family="text">
      <style:text-properties fo:font-variant="normal" fo:text-transform="none" fo:color="#0095b6" loext:opacity="100%" style:text-outline="false" style:text-line-through-style="none" style:text-line-through-type="none" style:text-position="0% 100%" style:font-name="Arial" fo:font-size="14pt" fo:letter-spacing="normal" fo:language="en" fo:country="US" fo:font-style="normal" style:text-underline-style="none" fo:font-weight="normal" fo:background-color="transparent" style:font-name-asian="Open Sans2" style:font-size-asian="14pt" style:font-style-asian="normal" style:font-weight-asian="normal" style:font-name-complex="Open Sans" style:font-size-complex="14pt" style:font-style-complex="normal" style:font-weight-complex="normal"/>
    </style:style>
    <style:style style:name="T23" style:family="text">
      <style:text-properties fo:font-size="18pt" fo:font-weight="normal" style:font-weight-asian="normal" style:font-weight-complex="normal"/>
    </style:style>
    <style:style style:name="T2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+mn-lt" fo:font-size="12pt" fo:letter-spacing="normal" fo:language="en" fo:country="US" fo:font-style="normal" style:text-underline-style="none" fo:font-weight="normal" fo:background-color="transparent" style:font-name-asian="+mn-ea" style:font-size-asian="12pt" style:font-style-asian="normal" style:font-weight-asian="normal" style:font-name-complex="+mn-cs" style:font-size-complex="1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6d5a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222222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30303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5d5d5d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-0.6cm" text:min-label-width="0.6cm"/>
        <style:text-properties fo:font-family="Open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name="Shape 0" draw:style-name="gr1" draw:text-style-name="P1" draw:layer="layout" svg:width="17.779cm" svg:height="8.873cm" svg:x="0.001cm" svg:y="0.0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" draw:style-name="gr2" draw:text-style-name="P2" draw:layer="layout" svg:width="17.779cm" svg:height="8.873cm" svg:x="0cm" svg:y="9.12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3" draw:layer="layout" svg:width="7.838cm" svg:height="7.838cm" svg:x="9.335cm" svg:y="9.55cm">
          <draw:image xlink:href="Pictures/1000000100000256000002563E26BCAC.png" xlink:type="simple" xlink:show="embed" xlink:actuate="onLoad" draw:mime-type="image/png">
            <text:p/>
          </draw:image>
        </draw:frame>
        <draw:custom-shape draw:name="Shape 3" draw:style-name="gr4" draw:text-style-name="P5" draw:layer="layout" svg:width="17.779cm" svg:height="9.126cm" svg:x="17.78cm" svg:y="8.874cm">
          <text:p text:style-name="P4"><text:span text:style-name="T1"><text:s text:c="2"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" draw:style-name="gr5" draw:text-style-name="P6" draw:layer="layout" svg:width="14.477cm" svg:height="3.936cm" svg:x="1.27cm" svg:y="2.7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0" draw:style-name="gr5" draw:text-style-name="P6" draw:layer="layout" svg:width="10.032cm" svg:height="1.117cm" svg:x="1.219cm" svg:y="6.6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" draw:style-name="gr6" draw:text-style-name="P2" draw:layer="layout" svg:width="4.5cm" svg:height="0.72cm" svg:x="12.5cm" svg:y="7cm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aximum="50000" draw:handle-range-x-minimum="0" draw:handle-position="?f2 0" draw:handle-position-x="?f2" draw:handle-position-y="0"/>
          </draw:enhanced-geometry>
        </draw:custom-shape>
        <draw:custom-shape draw:name="Text 13" draw:style-name="gr7" draw:text-style-name="P8" draw:layer="layout" svg:width="3.1cm" svg:height="0.5cm" svg:x="13.3cm" svg:y="7cm">
          <text:p text:style-name="P7"><text:span text:style-name="T2">{{education}}</text:span><text:span text:style-name="T3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4" draw:style-name="gr8" draw:text-style-name="P9" draw:layer="layout" svg:width="6.73cm" svg:height="0.964cm" svg:x="18.491cm" svg:y="0.4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5" draw:style-name="gr9" draw:text-style-name="P11" draw:layer="layout" svg:width="5cm" svg:height="0.812cm" svg:x="18.75cm" svg:y="0.45cm">
          <text:p text:style-name="P10"><text:span text:style-name="T4">О программе</text:span><text:span text:style-name="T1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6" draw:style-name="gr10" draw:text-style-name="P9" draw:layer="layout" svg:width="7.314cm" svg:height="4.317cm" svg:x="18.491cm" svg:y="1.47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7" draw:style-name="gr11" draw:text-style-name="P11" draw:layer="layout" svg:width="7.2cm" svg:height="4.7cm" svg:x="18.75cm" svg:y="1.15cm">
          <text:p text:style-name="P10"><text:span text:style-name="T5">{{about}}</text:span><text:span text:style-name="T1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8" draw:style-name="gr12" draw:text-style-name="P9" draw:layer="layout" svg:width="5.79cm" svg:height="0.964cm" svg:x="26.772cm" svg:y="0.4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9" draw:style-name="gr13" draw:text-style-name="P13" draw:layer="layout" svg:width="5.3cm" svg:height="0.812cm" svg:x="27.6cm" svg:y="0.55cm">
          <text:p text:style-name="P12"><text:span text:style-name="T4">Что я буду изучать</text:span><text:span text:style-name="T6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0" draw:style-name="gr8" draw:text-style-name="P9" draw:layer="layout" svg:width="6.095cm" svg:height="4.622cm" svg:x="26.721cm" svg:y="1.5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1" draw:style-name="gr14" draw:text-style-name="P15" draw:layer="layout" svg:width="5.6cm" svg:height="4cm" svg:x="27.6cm" svg:y="1.35cm">
          <text:p text:style-name="P14"><text:span text:style-name="T7">•</text:span><text:span text:style-name="T5"> {{study1}}</text:span></text:p>
          <text:p text:style-name="P14"><text:span text:style-name="T7">•</text:span><text:span text:style-name="T5"> {{study2}}</text:span></text:p>
          <text:p text:style-name="P14"><text:span text:style-name="T7">•</text:span><text:span text:style-name="T5"> {{study3}}</text:span></text:p>
          <text:p text:style-name="P14"><text:span text:style-name="T7">•</text:span><text:span text:style-name="T5"> {{study4}}</text:span></text:p>
          <text:p text:style-name="P14"><text:span text:style-name="T7">•</text:span><text:span text:style-name="T5"> {{study5}}</text:span></text:p>
          <text:p text:style-name="P14"><text:span text:style-name="T7">•</text:span><text:span text:style-name="T5"> {{study6}}</text:span></text:p>
          <text:p text:style-name="P14"><text:span text:style-name="T7">•</text:span><text:span text:style-name="T5"> {{study7}}</text:span></text:p>
          <text:p text:style-name="P14"><text:span text:style-name="T7">•</text:span><text:span text:style-name="T5"> {{study8}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6" draw:style-name="gr15" draw:text-style-name="P9" draw:layer="layout" svg:width="2.735cm" svg:height="0.863cm" svg:x="26.577cm" svg:y="7.59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7" draw:style-name="gr16" draw:text-style-name="P17" draw:layer="layout" svg:width="3.4cm" svg:height="0.8cm" svg:x="26cm" svg:y="7.68cm">
          <text:p text:style-name="P16"><text:span text:style-name="T8">Информация о программе и условиях поступления</text:span><text:span text:style-name="T9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8" draw:style-name="gr8" draw:text-style-name="P9" draw:layer="layout" svg:width="2.742cm" svg:height="0.863cm" svg:x="30.277cm" svg:y="7.59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0" draw:style-name="gr8" draw:text-style-name="P9" draw:layer="layout" svg:width="4.368cm" svg:height="0.761cm" svg:x="1.194cm" svg:y="9.44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2" draw:style-name="gr8" draw:text-style-name="P9" draw:layer="layout" svg:width="4.952cm" svg:height="0.863cm" svg:x="1.194cm" svg:y="10.23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4" draw:style-name="gr8" draw:text-style-name="P9" draw:layer="layout" svg:width="5.333cm" svg:height="0.761cm" svg:x="7.214cm" svg:y="9.44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6" draw:style-name="gr8" draw:text-style-name="P9" draw:layer="layout" svg:width="4.952cm" svg:height="0.863cm" svg:x="7.214cm" svg:y="10.23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8" draw:style-name="gr8" draw:text-style-name="P9" draw:layer="layout" svg:width="3.047cm" svg:height="0.761cm" svg:x="13.335cm" svg:y="9.44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0" draw:style-name="gr17" draw:text-style-name="P9" draw:layer="layout" svg:width="3.682cm" svg:height="1.264cm" svg:x="13.335cm" svg:y="10.23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2" draw:style-name="gr8" draw:text-style-name="P9" draw:layer="layout" svg:width="3.936cm" svg:height="0.761cm" svg:x="13.335cm" svg:y="11.52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4" draw:style-name="gr8" draw:text-style-name="P9" draw:layer="layout" svg:width="3.606cm" svg:height="2.285cm" svg:x="13.335cm" svg:y="12.34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6" draw:style-name="gr8" draw:text-style-name="P9" draw:layer="layout" svg:width="5.79cm" svg:height="0.761cm" svg:x="1.194cm" svg:y="11.58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8" draw:style-name="gr8" draw:text-style-name="P9" draw:layer="layout" svg:width="12.496cm" svg:height="4.114cm" svg:x="0.711cm" svg:y="12.4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0" draw:style-name="gr5" draw:text-style-name="P6" draw:layer="layout" svg:width="11.175cm" svg:height="3.098cm" svg:x="18.542cm" svg:y="9.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2" draw:style-name="gr18" draw:text-style-name="P6" draw:layer="layout" svg:width="7.923cm" svg:height="2.539cm" svg:x="18.577cm" svg:y="12.6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3" draw:style-name="gr5" draw:text-style-name="P6" draw:layer="layout" svg:width="2.234cm" svg:height="0.863cm" svg:x="18.831cm" svg:y="12.90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4" draw:style-name="gr19" draw:text-style-name="P19" draw:layer="layout" svg:width="2.9cm" svg:height="1.88cm" svg:x="18.4cm" svg:y="13.22cm">
          <text:p text:style-name="P18"><text:span text:style-name="T10">1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5" draw:style-name="gr20" draw:text-style-name="P20" draw:layer="layout" svg:width="2.83cm" svg:height="1.015cm" svg:x="22.975cm" svg:y="12.85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6" draw:style-name="gr21" draw:text-style-name="P22" draw:layer="layout" svg:width="4.9cm" svg:height="0.863cm" svg:x="20.25cm" svg:y="13.68cm">
          <text:p text:style-name="P21"><text:span text:style-name="T11">программ высшего образования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7" draw:style-name="gr22" draw:text-style-name="P6" draw:layer="layout" svg:width="7.284cm" svg:height="2.539cm" svg:x="27cm" svg:y="12.6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8" draw:style-name="gr5" draw:text-style-name="P6" draw:layer="layout" svg:width="2.234cm" svg:height="0.863cm" svg:x="27.638cm" svg:y="12.90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0" draw:style-name="gr5" draw:text-style-name="P6" draw:layer="layout" svg:width="2.793cm" svg:height="1.015cm" svg:x="30.975cm" svg:y="12.85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2" draw:style-name="gr23" draw:text-style-name="P6" draw:layer="layout" svg:width="7.923cm" svg:height="2.311cm" svg:x="18.577cm" svg:y="15.1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3" draw:style-name="gr5" draw:text-style-name="P6" draw:layer="layout" svg:width="2.488cm" svg:height="0.812cm" svg:x="18.831cm" svg:y="15.3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5" draw:style-name="gr24" draw:text-style-name="P6" draw:layer="layout" svg:width="2.83cm" svg:height="1.051cm" svg:x="22.975cm" svg:y="15.41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7" draw:style-name="gr25" draw:text-style-name="P6" draw:layer="layout" svg:width="7.3cm" svg:height="2.311cm" svg:x="27cm" svg:y="15.1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8" draw:style-name="gr26" draw:text-style-name="P6" draw:layer="layout" svg:width="2.234cm" svg:height="0.899cm" svg:x="27.638cm" svg:y="15.3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0" draw:style-name="gr27" draw:text-style-name="P6" draw:layer="layout" svg:width="2.825cm" svg:height="1.066cm" svg:x="30.975cm" svg:y="15.36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8" draw:text-style-name="P3" draw:layer="layout" svg:width="6.25cm" svg:height="1.25cm" svg:x="1.2cm" svg:y="0.695cm">
          <draw:image xlink:href="Pictures/10000001000001AA00000055F2CED9A8.png" xlink:type="simple" xlink:show="embed" xlink:actuate="onLoad" draw:mime-type="image/png">
            <text:p/>
          </draw:image>
        </draw:frame>
        <draw:custom-shape draw:name="Text 2" draw:style-name="gr29" draw:text-style-name="P17" draw:layer="layout" svg:width="3.4cm" svg:height="0.8cm" svg:x="29.9cm" svg:y="7.68cm">
          <text:p text:style-name="P16"><text:span text:style-name="T8">Подписывайтесь на наши официальные каналы</text:span><text:span text:style-name="T9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" draw:style-name="gr30" draw:text-style-name="P24" draw:layer="layout" svg:width="2.599cm" svg:height="1.84cm" svg:x="18.677cm" svg:y="10.66cm">
          <text:p text:style-name="P23"><text:span text:style-name="T12">ЭТО:</text:span><text:span text:style-name="T13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31" draw:text-style-name="P26" draw:layer="layout" svg:width="2.9cm" svg:height="1.88cm" svg:x="18.4cm" svg:y="15.22cm">
          <text:p text:style-name="P25"><text:span text:style-name="T10">109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" draw:style-name="gr32" draw:text-style-name="P19" draw:layer="layout" svg:width="2.9cm" svg:height="1.88cm" svg:x="26.1cm" svg:y="13.22cm">
          <text:p text:style-name="P18"><text:span text:style-name="T10">4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" draw:style-name="gr33" draw:text-style-name="P22" draw:layer="layout" svg:width="5.75cm" svg:height="0.863cm" svg:x="27.95cm" svg:y="15.681cm">
          <text:p text:style-name="P21"><text:span text:style-name="T11">профессорско-</text:span><text:span text:style-name="T11"><text:line-break/></text:span><text:span text:style-name="T11">преподавательский состав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7" draw:style-name="gr34" draw:text-style-name="P22" draw:layer="layout" svg:width="4.9cm" svg:height="0.863cm" svg:x="21.45cm" svg:y="15.681cm">
          <text:p text:style-name="P21"><text:span text:style-name="T11">студентов</text:span><text:span text:style-name="T11"><text:line-break/></text:span><text:span text:style-name="T11">и курсантов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8" draw:style-name="gr35" draw:text-style-name="P22" draw:layer="layout" svg:width="4.9cm" svg:height="0.863cm" svg:x="27.95cm" svg:y="13.681cm">
          <text:p text:style-name="P21"><text:span text:style-name="T11">профильных</text:span><text:span text:style-name="T11"><text:line-break/></text:span><text:span text:style-name="T11">компаний-партнеров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0" draw:style-name="gr36" draw:text-style-name="P19" draw:layer="layout" svg:width="2.9cm" svg:height="1.88cm" svg:x="26.1cm" svg:y="15.22cm">
          <text:p text:style-name="P18"><text:span text:style-name="T10">4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8" draw:text-style-name="P3" draw:layer="layout" svg:width="1.95cm" svg:height="1.957cm" svg:x="13.887cm" svg:y="0.55cm">
          <draw:image xlink:href="Pictures/100000010000025400000256C7CBF2F8.png" xlink:type="simple" xlink:show="embed" xlink:actuate="onLoad" draw:mime-type="image/png">
            <text:p/>
          </draw:image>
        </draw:frame>
        <draw:frame draw:style-name="gr28" draw:text-style-name="P3" draw:layer="layout" svg:width="2.227cm" svg:height="2.227cm" svg:x="26.52cm" svg:y="5.5cm">
          <draw:image xlink:href="Pictures/100000010000025600000256A16EAB2F.png" xlink:type="simple" xlink:show="embed" xlink:actuate="onLoad" draw:mime-type="image/png">
            <text:p/>
          </draw:image>
        </draw:frame>
        <draw:custom-shape draw:name="Text 9" draw:style-name="gr37" draw:text-style-name="P28" draw:layer="layout" svg:width="15.7cm" svg:height="3.513cm" svg:x="1.3cm" svg:y="2.75cm">
          <text:p text:style-name="P27"><text:span text:style-name="T14">{{program}}</text:span><text:span text:style-name="T15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1" draw:style-name="gr38" draw:text-style-name="P30" draw:layer="layout" svg:width="4.368cm" svg:height="0.634cm" svg:x="1.3cm" svg:y="9.25cm">
          <text:p text:style-name="P29"><text:span text:style-name="T16">Профиль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3" draw:style-name="gr39" draw:text-style-name="P11" draw:layer="layout" svg:width="5.7cm" svg:height="1.482cm" svg:x="1.3cm" svg:y="9.8cm">
          <text:p text:style-name="P10"><text:span text:style-name="T17">{{profile_value}}</text:span><text:span text:style-name="T1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5" draw:style-name="gr40" draw:text-style-name="P13" draw:layer="layout" svg:width="5.333cm" svg:height="0.634cm" svg:x="7.25cm" svg:y="9.25cm">
          <text:p text:style-name="P12"><text:span text:style-name="T4">Форма обучения</text:span><text:span text:style-name="T6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9" draw:style-name="gr41" draw:text-style-name="P13" draw:layer="layout" svg:width="3.047cm" svg:height="0.634cm" svg:x="13.65cm" svg:y="9.25cm">
          <text:p text:style-name="P12"><text:span text:style-name="T4">ЕГЭ</text:span><text:span text:style-name="T6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3" draw:style-name="gr42" draw:text-style-name="P32" draw:layer="layout" svg:width="3.8cm" svg:height="0.609cm" svg:x="13.65cm" svg:y="11.35cm">
          <text:p text:style-name="P31"><text:span text:style-name="T18">ЕГЭ на выбор</text:span><text:span text:style-name="T19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5" draw:style-name="gr43" draw:text-style-name="P34" draw:layer="layout" svg:width="3.8cm" svg:height="2.276cm" svg:x="13.65cm" svg:y="11.95cm">
          <text:p text:style-name="P33"><text:span text:style-name="T17">{{VI_3}}</text:span><text:span text:style-name="T20"> </text:span></text:p>
          <text:p text:style-name="P33"><text:span text:style-name="T17">{{VI_4}}</text:span><text:span text:style-name="T20"> </text:span></text:p>
          <text:p text:style-name="P33"><text:span text:style-name="T17">{{VI_5}}</text:span><text:span text:style-name="T20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7" draw:style-name="gr44" draw:text-style-name="P11" draw:layer="layout" svg:width="5.79cm" svg:height="0.634cm" svg:x="1.3cm" svg:y="13.55cm">
          <text:p text:style-name="P10"><text:span text:style-name="T21">Возможности</text:span><text:span text:style-name="T1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9" draw:style-name="gr45" draw:text-style-name="P13" draw:layer="layout" svg:width="12.085cm" svg:height="3.1cm" svg:x="1.25cm" svg:y="14.25cm">
          <text:p text:style-name="P12"><text:span text:style-name="T22">•</text:span><text:span text:style-name="T17"> {{opp1}}</text:span><text:span text:style-name="T6"> </text:span></text:p>
          <text:p text:style-name="P12"><text:span text:style-name="T22">•</text:span><text:span text:style-name="T17"> {{opp2}}</text:span><text:span text:style-name="T6"> </text:span></text:p>
          <text:p text:style-name="P12"><text:span text:style-name="T22">•</text:span><text:span text:style-name="T17"> {{opp3}}</text:span><text:span text:style-name="T6"> </text:span></text:p>
          <text:p text:style-name="P12"><text:span text:style-name="T22">•</text:span><text:span text:style-name="T17"> {{opp4}}</text:span><text:span text:style-name="T6"> </text:span></text:p>
          <text:p text:style-name="P12"><text:span text:style-name="T22">•</text:span><text:span text:style-name="T17"> {{opp5}}</text:span><text:span text:style-name="T6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1" draw:style-name="gr46" draw:text-style-name="P36" draw:layer="layout" svg:width="15.9cm" svg:height="2.85cm" svg:x="18.6cm" svg:y="9.2cm">
          <text:p text:style-name="P35"><text:span text:style-name="T14">{{faculty}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7" draw:style-name="gr47" draw:text-style-name="P11" draw:layer="layout" svg:width="5.5cm" svg:height="1.85cm" svg:x="7.25cm" svg:y="10.75cm">
          <text:p text:style-name="P10"><text:span text:style-name="T17">{{form}}</text:span><text:span text:style-name="T1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" draw:style-name="gr48" draw:text-style-name="P11" draw:layer="layout" svg:width="7.5cm" svg:height="1cm" svg:x="1.3cm" svg:y="6.879cm">
          <text:p text:style-name="P10"><text:span text:style-name="T11">{{code_program}}</text:span><text:span text:style-name="T1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2" draw:style-name="gr49" draw:text-style-name="P34" draw:layer="layout" svg:width="3.8cm" svg:height="1.6cm" svg:x="13.65cm" svg:y="9.75cm">
          <text:p text:style-name="P33"><text:span text:style-name="T17">{{VI_1}}</text:span><text:span text:style-name="T20"> </text:span></text:p>
          <text:p text:style-name="P33"><text:span text:style-name="T17">{{VI_2}}</text:span><text:span text:style-name="T20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6" draw:style-name="gr50" draw:text-style-name="P11" draw:layer="layout" svg:width="5.5cm" svg:height="0.814cm" svg:x="7.25cm" svg:y="9.936cm">
          <text:p text:style-name="P10"><text:span text:style-name="T17">{{budget_or_paid}}</text:span><text:span text:style-name="T1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8" draw:style-name="gr51" draw:text-style-name="P30" draw:layer="layout" svg:width="4.368cm" svg:height="0.634cm" svg:x="1.3cm" svg:y="11.55cm">
          <text:p text:style-name="P29"><text:span text:style-name="T16">Количество мест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0" draw:style-name="gr52" draw:text-style-name="P38" draw:layer="layout" svg:width="1.2cm" svg:height="0.8cm" svg:x="1.3cm" svg:y="12.2cm">
          <text:p text:style-name="P37"><text:span text:style-name="T17">{{budget_total}}</text:span><text:span text:style-name="T23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2" draw:style-name="gr53" draw:text-style-name="P38" draw:layer="layout" svg:width="1.2cm" svg:height="0.8cm" svg:x="1.3cm" svg:y="12.9cm">
          <text:p text:style-name="P37"><text:span text:style-name="T17">{{off_budgetl}}</text:span><text:span text:style-name="T23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3" draw:style-name="gr54" draw:text-style-name="P11" draw:layer="layout" svg:width="3.5cm" svg:height="0.9cm" svg:x="2.1cm" svg:y="12.1cm">
          <text:p text:style-name="P10"><text:span text:style-name="T17">бюджетных</text:span><text:span text:style-name="T1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4" draw:style-name="gr55" draw:text-style-name="P11" draw:layer="layout" svg:width="3.5cm" svg:height="0.9cm" svg:x="2.1cm" svg:y="12.8cm">
          <text:p text:style-name="P10"><text:span text:style-name="T17">платных</text:span><text:span text:style-name="T1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8" draw:text-style-name="P3" draw:layer="layout" svg:width="2.5cm" svg:height="2.5cm" svg:x="30.316cm" svg:y="5.35cm">
          <draw:image xlink:href="Pictures/10000000000004830000048391D6C686.png" xlink:type="simple" xlink:show="embed" xlink:actuate="onLoad" draw:mime-type="image/png">
            <text:p/>
          </draw:image>
        </draw:frame>
        <presentation:notes draw:style-name="dp2">
          <draw:page-thumbnail draw:name="Slide Image Placeholder 1" draw:style-name="gr56" draw:layer="layout" svg:width="15.239cm" svg:height="8.572cm" svg:x="1.905cm" svg:y="3.175cm" draw:page-number="1" presentation:class="page"/>
          <draw:frame draw:name="Notes Placeholder 2" presentation:style-name="pr1" draw:text-style-name="P39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41" draw:layer="layout" svg:width="8.254cm" svg:height="1.273cm" svg:x="10.791cm" svg:y="24.126cm" presentation:class="page-number" presentation:user-transformed="true">
            <draw:text-box>
              <text:p text:style-name="P40"><text:span text:style-name="T24"><text:page-number>&lt;номер&gt;</text:page-number></text:span><text:span text:style-name="T24"><text:s/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+mn-cs" svg:font-family="+mn-cs"/>
    <style:font-face style:name="+mn-ea" svg:font-family="+mn-ea"/>
    <style:font-face style:name="+mn-lt" svg:font-family="+mn-lt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Open Sans" svg:font-family="'Open Sans'" style:font-family-generic="swiss" style:font-pitch="variable"/>
    <style:font-face style:name="Open Sans1" svg:font-family="'Open Sans'"/>
    <style:font-face style:name="Open Sans2" svg:font-family="'Open Sans'" style:font-family-generic="modern" style:font-pitch="fixed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_20_Dot_20_1" draw:fill="none" draw:opacity="50%" draw:shadow-opacity="50%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lef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Open Sans1" fo:font-family="'Open Sans'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top="0.4cm" fo:margin-bottom="0cm" fo:line-height="100%" fo:text-align="lef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Open Sans1" fo:font-family="'Open Sans'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/>
    </style:style>
    <style:style style:name="DEFAULT-outline3" style:family="presentation" style:parent-style-name="DEFAULT-outline2">
      <style:paragraph-properties fo:margin-top="0.3cm" fo:margin-bottom="0cm" fo:line-height="100%" fo:text-align="lef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Open Sans1" fo:font-family="'Open Sans'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DEFAULT-outline4" style:family="presentation" style:parent-style-name="DEFAULT-outline3">
      <style:paragraph-properties fo:margin-top="0.2cm" fo:margin-bottom="0cm" fo:line-height="100%" fo:text-align="lef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Open Sans1" fo:font-family="'Open Sans'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lef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Open Sans1" fo:font-family="'Open Sans'" fo:font-size="18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5.56cm" fo:page-height="17.748cm" style:print-orientation="landscape"/>
    </style:page-layout>
    <style:page-layout style:name="PM2">
      <style:page-layout-properties fo:margin-top="0cm" fo:margin-bottom="0cm" fo:margin-left="0cm" fo:margin-right="0cm" fo:page-width="17.748cm" fo:page-height="35.56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right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right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32.003cm" svg:height="2.962cm" svg:x="1.778cm" svg:y="0.708cm" presentation:class="title" presentation:placeholder="true">
        <draw:text-box/>
      </draw:frame>
      <draw:frame presentation:style-name="DEFAULT-outline1" draw:layer="backgroundobjects" svg:width="32.003cm" svg:height="10.292cm" svg:x="1.778cm" svg:y="4.153cm" presentation:class="outline" presentation:placeholder="true">
        <draw:text-box/>
      </draw:frame>
      <presentation:notes style:page-layout-name="PM2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dc:title>Шаблон буклета «Преподавание химии и биологии»</dc:title>
    <dc:subject>Шаблон буклета в формате ODP</dc:subject>
    <meta:editing-cycles>35</meta:editing-cycles>
    <meta:creation-date>2026-03-26T16:59:55</meta:creation-date>
    <dc:date>2026-04-24T17:56:01.113479400</dc:date>
    <meta:editing-duration>PT3H59M</meta:editing-duration>
    <meta:generator>LibreOffice/26.2.2.2$Windows_X86_64 LibreOffice_project/1f77d10d6938fd34972958f64b2bcfa54f8b1ba5</meta:generator>
    <meta:document-statistic meta:object-count="96"/>
    <meta:user-defined meta:name="AppVersion">16.0000</meta:user-defined>
    <meta:user-defined meta:name="Notes" meta:value-type="float">2</meta:user-defined>
    <meta:user-defined meta:name="PresentationFormat">On-screen Show (16:9)</meta:user-defined>
    <meta:user-defined meta:name="Slides" meta:value-type="float">2</meta:user-defined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Basic/Standard/test.xml><?xml version="1.0" encoding="utf-8"?>
<!DOCTYPE module  PUBLIC '-//OpenOffice.org//DTD OfficeDocument 1.0//EN'  'module.dtd'>
<script:module xmlns:script="http://openoffice.org/2000/script" script:name="test" script:language="StarBasic" script:moduleType="normal">REM  *****  BASIC  *****

Sub Main

{
  "title": "Преподавание химии\nи биологии: современный\nподход",
  "code_line": "44.03.05 Педагогическое образование\n(с двумя профилями подготовки)",
  "degree": "Бакалавриат",
  "about_text": "Программа подготовит вас к преподавательской деятельности в сфере естественно-научного образования. Вы получите глубокие знания по химии и биологии, освоите современные методики и педагогические технологии, необходимые для эффективного обучения школьников и взрослых. Обучение сочетает научную основу с практической направленностью, включая работу с интерактивным оборудованием, цифровыми инструментами обучения и методиками проектной деятельности.",
  "study1": "Химия",
  "study2": "Биология",
  "study3": "Методы научного и педагогического исследования",
  "study4": "Методики организации обучения и воспитания в сфере образования",
  "study5": "Методики реализации учебных программ базовых и элективных курсов по выбранному профилю в различных образовательных учреждениях",
  "profile_value": "Химия. Биология",
  "mode_value": "Очная (5 лет)",
  "exam1": "Русский язык",
  "exam2": "Химия",
  "exam3": "Физика",
  "exam4": "Математика",
  "exam5": "Биология",
  "opp1": "Право преподавать две дисциплины",
  "opp2": "Современные лаборатории и оборудование, включая цифровые ресурсы",
  "opp3": "Практика в ведущих образовательных учреждениях региона",
  "opp4": "Соответствие требованиям образовательных стандартов",
  "opp5": "Поддержка карьерного роста через партнерскую сеть",
  "institute_title": "ЕСТЕСТВЕННО-\nТЕХНОЛОГИЧЕСКИЙ ИНСТИТУТ\nЭТО:",
  "stat1": "15",
  "stat1_label": "программ высшего\nобразования",
  "stat2": "48",
  "stat2_label": "профильных\nкомпаний-партнеров",
  "stat3": "433",
  "stat3_label": "студентов",
  "stat4": "39",
  "stat4_label": "профессорско-\nпреподавательский состав"
}

End Sub
</script:module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